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New,Bold" svg:font-family="CourierNew,Bold" style:font-family-generic="system"/>
  </office:font-face-decls>
  <office:automatic-styles>
    <style:style style:name="P1" style:parent-style-name="Normale" style:master-page-name="MP0" style:family="paragraph">
      <style:paragraph-properties fo:break-before="page"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1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1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1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1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1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1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1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1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1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1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2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2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2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2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2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2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2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2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2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2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3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3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3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3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3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3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3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3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3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3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4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4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4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4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4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4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4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4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4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4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5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5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5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5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5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5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5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5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5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5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6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6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6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6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6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6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6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6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6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6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7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7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7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7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7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7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7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7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7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7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8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8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8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8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8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8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8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8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8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8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9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9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9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9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9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9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9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9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9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9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0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0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0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0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0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0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0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0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0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0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1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1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1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1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1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1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1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1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1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1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2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2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2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2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2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2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2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2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2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2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3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3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3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3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3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3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3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3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3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3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4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4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4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4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4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4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4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4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4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4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5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5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5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5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5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5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5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5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5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5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6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6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6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6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6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6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6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6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6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6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7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7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7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7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7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7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7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7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7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7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8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8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8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8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8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8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8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8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8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8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9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9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9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9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9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9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9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9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9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9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0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0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0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0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0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0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0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0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0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0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1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1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1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1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1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1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1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1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1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1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2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2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2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2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2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2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2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2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2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2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3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3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3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3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3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3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3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3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3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3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4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4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4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4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4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4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4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4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4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4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5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5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5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5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5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5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5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5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5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5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6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6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6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6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6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6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6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6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6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6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7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7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7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7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7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7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7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7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7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7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8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8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8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8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8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8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8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8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8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8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9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9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9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9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9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9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9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9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9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9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0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0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0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0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0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0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0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0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0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0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1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1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1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1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1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1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1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1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1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1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2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2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2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2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2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2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2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2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2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2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3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3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3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3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3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3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3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3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3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3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4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4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4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4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4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4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4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4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4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4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5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5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5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5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5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5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5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5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5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5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6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6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6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6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6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6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6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6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6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6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7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7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7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7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7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7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7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7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7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7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8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8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8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8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8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8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8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8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8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8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9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9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9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9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9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9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9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9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9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9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0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0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0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0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0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0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0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0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0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0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1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1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1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1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1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1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1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1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1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1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2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2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2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2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2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2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2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2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2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2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3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3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3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3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3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3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3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3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3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3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4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4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4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4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4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4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4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4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4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4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5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5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5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5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5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5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5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5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5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5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6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6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6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6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6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6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6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6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6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6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7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7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7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7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7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7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7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7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7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7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8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8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8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8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8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8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8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8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8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8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9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9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9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9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9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9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9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9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9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9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0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0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0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0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0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0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0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0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0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0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1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1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1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1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1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1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1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1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1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1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2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2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2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2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2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2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2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2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2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2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3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3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3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3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3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3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3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3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3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3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4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4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4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4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4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4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4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4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4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4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5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5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5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5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5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5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5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5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5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5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6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6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6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6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6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6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6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6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6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6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7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7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7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7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7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7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7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7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7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7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8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8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8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8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8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8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8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8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8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8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9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9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9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9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9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9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9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9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9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9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0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0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0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0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0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0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0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0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0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0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1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1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1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1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1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1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1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1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1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1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2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2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2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2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2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2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2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2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2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2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3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3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3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3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3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3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3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3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3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3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4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4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4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4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4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4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4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4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4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4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5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5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5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5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5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5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5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5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5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5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6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6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6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6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6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6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6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6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6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6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7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7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7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7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7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7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7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7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7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7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8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8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8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8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8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8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8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8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8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8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9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9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9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9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9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9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9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9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9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9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0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0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0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0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0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0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0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0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0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0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1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1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1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1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1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1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1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1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1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1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2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2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2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2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2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2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2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2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2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2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3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3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3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3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3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3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3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3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3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3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4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4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4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4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4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4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4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4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4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4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5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5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5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5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5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5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5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5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5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5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6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6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6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6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6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6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6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6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6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6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7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7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7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7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7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7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7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7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7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7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8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8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8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8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8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8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8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8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8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8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9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9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9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9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9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9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9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9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9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9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0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0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0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0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0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0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0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0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0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0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1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1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1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1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1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1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1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1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1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1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2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2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2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2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2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2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2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2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2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2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3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3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3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3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3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3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3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3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3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3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4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4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4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4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4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4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4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4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4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4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5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5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5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5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5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5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5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5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5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5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6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6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6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6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6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6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6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6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6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6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7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7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7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7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7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7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7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7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7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7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8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8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8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8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8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8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8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8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8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8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9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9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9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9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9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9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9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9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9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9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0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0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0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0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0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0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0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0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0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0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1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1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1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1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1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1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1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1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1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1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2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2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2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2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2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2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2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2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2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2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3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3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3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3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3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3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3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3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3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3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4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4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4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4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4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4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4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4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4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4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5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5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5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5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5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5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5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5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5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5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6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6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6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6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6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6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6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6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6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6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7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7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72" style:parent-style-name="Normale" style:family="paragraph">
      <style:paragraph-properties fo:text-align="justify"/>
    </style:style>
    <style:style style:name="T1073" style:parent-style-name="Car.predefinitoparagrafo" style:family="text">
      <style:text-properties fo:language="it" fo:country="IT"/>
    </style:style>
  </office:automatic-styles>
  <office:body>
    <office:text text:use-soft-page-breaks="true">
      <text:p text:style-name="P1"><text:s/>1,1 Genealogia de Gesùs Cristu fillu de Dàvidi,  fillu de Abramu.</text:p>
      <text:p text:style-name="P2">1,2 Abramu ingenereit a Isacu, Isacu ingenereit a Giacobbu, Giacobbu iat generau a Giudas e a is fradis, </text:p>
      <text:p text:style-name="P3">1,3 Giuda ingenereit a Fares e a Zara de Tamar, Fares ingenereit a Esrom, Esrom ingenereit a Aram,</text:p>
      <text:p text:style-name="P4">1,4 Aram ingenereit a Aminadàb, Aminadàb ingenereit a Naasson, Naasson ingenereit a Salmon,</text:p>
      <text:p text:style-name="P5">1,5 Salmon ingenereit a Booz de Racab, Booz ingenereit a Obed de Rut, Obed ingenereit a  Jesse,</text:p>
      <text:p text:style-name="P6">1,6 Jesse ingenereit a Dàvidi su rei Dàvidi ingenereit a Salomoni cun sa chi fiat stètia sa pobidda de Uria,</text:p>
      <text:p text:style-name="P7">1,7 Salomoni ingenereit a Roboamu, Roboamu ingenereit a Abia, Abia ingenereit a Asàf,</text:p>
      <text:p text:style-name="P8">1,8 Asaf ingenereit a Giòsafat, Giosafat ingenereit a Joram, Joram ingenereit a Ozia,</text:p>
      <text:p text:style-name="P9">1,9 Ozia ingenereit a Joatàm, Ioatam ingenereit a Acàz, Acàz ingenereit a Ezechia,piga</text:p>
      <text:p text:style-name="P10">1,10 Ezechia ingenereit a Manasse, Manasse ingenereit a Amos, Amos ingenereit a Giosia,</text:p>
      <text:p text:style-name="P11">1,11 Giosia ingenereit a Jeconias/Ieconia e a is fradis, a su tempus de su disterru in Babilònia.</text:p>
      <text:p text:style-name="P12">1,12 A pustis de su disterru de Babilonia, Geconias ingenereit a Salatièl, Salatièl ingenereit a Zorobabele,</text:p>
      <text:p text:style-name="P13">1,13 Zorobabele ingenereit a Abiud/Abiùd, Abiud ingenereit a Elìacim, Elìacim/Eliachim ingenereit a Azòr,</text:p>
      <text:p text:style-name="P14">1,14 Azòr ingenereit a Sadòc, Sadoc ingenereit a Achìm, Achim ingenereit a Eliud,</text:p>
      <text:p text:style-name="P15">1,15 Eliud ingenereit a Eleazar, Eleazar ingenereit a Matàn, Matàn ingenereit a Giacobbu,</text:p>
      <text:p text:style-name="P16">1,16 Giacobbu ingenereit a Giusepi, su sposu/pobiddu de Maria, de issa fiat nàsciu/nasceit Gesùs  nomenau Cristu</text:p>
      <text:p text:style-name="P17">
1,17 Sa summa de totu is generatzionis, de Abramu a Dàvidi, funt catòdixi; de Dàvidi fintzas a sa disisterru in Babilònia funt sèmpiri catòdixi; de su disisterru in Babilonia a Cristu funt, inprefinis, catòdixi.</text:p>
      <text:p text:style-name="P18">1,18 Custu est su contu de cumenti est nàsciu Gesùs Cristu: Maria, sa mama, sendu sposa cun Giusepi, innantis chi essant andaus a bìviri impari si fiat agatada prìngia/gràida po òpera de su Spìridu Santu. </text:p>
      <text:p text:style-name="P19">1,19 Giusepi su sposu, sendi giustu e ca no dda boliat disfamai ananti de totus, iat decidiu de dda arrepudiai a sa scusi.</text:p>
      <text:p text:style-name="P20">1,20 In s'interis chi fiat pensendi a custas cosas, ecu ca ddi fiat cumpartu un'àngiulu de su Sennori narendi: «Giusepi, fillu de Dàvidi, no timas a pigai a Maria, poita ca su chi est ingenerau in issa est su Spìridu Santu.</text:p>
      <text:p text:style-name="P21">1,21 A issa dd'at a nàsciri unu fillu e tui ddas a pònniri a nòmini Gesùs: ca issu at a sarvai su pòpulu suu de is pecaus insoru».</text:p>
      <text:p text:style-name="P22">1,22 Totu custu fiat acuntèssiu po chi si fessat cumpriri su chi iat narau su Sennori po mesu de su profeta:</text:p>
      <text:p text:style-name="P23">1,23 Ecu, sa vìrgini at a ingendrai e at a fàiri nàsciri unu fillu e dd'ant a pònniri a nòmini Emanueli, chi bolit narai Deus est cun nosu. </text:p>
      <text:p text:style-name="P24">1,24 Scidau chi si ndi fiat, Giusepi iat fatu cumenti dd'iat cumandau s'àngiulu de su Sennori e s'iat pigau in fatu a sa mulleri, </text:p>
      <text:p text:style-name="P25">1,25 chi, chene dda cònnosciri iat donau vida a unu fillu,  e issu dd'iat postu a nòmini Gesùs.</text:p>
      <text:p text:style-name="P26">2,1 Gesùs fiat nàsciu in Betlemmi de Giudea, a su tempus de su rei Erodi.  Unus cantu Magus fiant lòmpius de orienti a Gerusalemmi e preguntànt:</text:p>
      <text:p text:style-name="P27">2,2 «Innui est su rei de is Giudeus chi est nàsciu? Eus bistu  in orienti su steddu suu, e seus bènnius a dd'adorai».</text:p>
      <text:p text:style-name="P28">2,3 Intendendi custus fueddus, su rei Erodi fiat a pistighìngiu, e cun issu totu Gerusalemmi.</text:p>
      <text:p text:style-name="P29">2,4 Arreuniu chi iat totu is sacerdotus majoris e is scribas de su pòpulu, ddis iat preguntau su logu innui depiat nàsciri su Messia.</text:p>
      <text:soft-page-break/>
      <text:p text:style-name="P30">2,5 Dd'iant arrespustu: «In Betlemmi de Giudea, ca aici est scritu de su profeta:</text:p>
      <text:p text:style-name="P31">2,6 E tui, Betlemmi, terra de Giudas,
no ses sa prus pitica de is capitalis de Giudas:
ca de tui nd'at a essiri, difatis, una ghia chi at a pàsciri Israeli, su pòpulu miu».
</text:p>
      <text:p text:style-name="P32">2,7 Tandus Erodi, a sa scusi iat tzerriau is Magus, ddus iat preguntaus beni beni  in cali tempus ddis fiat cumpartu su steddu;</text:p>
      <text:p text:style-name="P33">2,8 e ddus iat mandaus a Betlemmi arrecumandaide·ddis: «Baxei e informai·sì beni de su pipiu e, candu dd'agatais, feimi·ddu sciri, po chi deu puru potza andai a dd'adorai».</text:p>
      <text:p text:style-name="P34">2,9 Intèndiu chi iant is fueddus de su rei, fiant mòvius. E alloddu su steddu, chi iant bistu essendi, chi fiat ananti insoru, fintzas a nci arribbai a su logu innui fiat su pipiu e innia si fiat firmau.
 
</text:p>
      <text:p text:style-name="P35">2,10 E biendi su steddu, ddis iat pigau unu prexu mannu.</text:p>
      <text:p text:style-name="P36">2,11 Intraus me in sa domu, iant bistu a su pipiu cun Maria, sa mama, e si fiant ingenugaus a is peis suus po dd'adorai.  Apustis iant abertu is siddaus insoru e dd'iant ofertu in donu oru, timòngia e mirra.</text:p>
      <text:p text:style-name="P37">2,12 A pustis chi ddus iant avèrtius in bisu a no torrai anca fiat Erodi, fiant torraus a logu insoru passendi de un'àtera bia.</text:p>
      <text:p text:style-name="P38">2,13 Aditzu·aditzu chi fiant mòvius, Giusepi iat bistu in bisu un'àngiulu de su Sennori chi dd'iat narau: «Pesa·ti·ndi, piga a su pipiu e a sa mama e fui·tì cun issus a Egitu, e abarra innia fintzas a candu ti ddu naru deu, ca Erodi est circhendi a su pipiu po ddu bociri.</text:p>
      <text:p text:style-name="P39">2,14 Giusepi, si ndi fiat pesau e iat pigau a su pipiu e a sa mama e aintru de noti si fiat fuiu a Egitu.</text:p>
      <text:p text:style-name="P40">2,15 Innia fiat abarrau fintzas a sa morti de Erodi, po chi si fessit cumpriu su chi iat narau su Sennori e chi iat annuntziau su profeta:
De s'Egitu nd'apu tzerriau a fillu miu.
</text:p>
      <text:p text:style-name="P41">2,16 Erodi, iat bistu chi is Magus dd'iant pigau in trampa, si fiat arrennegau e iat cumandau a bociri totu is pipius de Betlemmi, e de aintru de is trèminis suus, de  duus annus o prus pagu, cunforma a su tempus chi dd'iant narau is Magus.</text:p>
      <text:p text:style-name="P42">2,17 Insaras si fiat cumpriu su chi iat annuntziau su profeta Geremia.</text:p>
      <text:p text:style-name="P43">2,18 Unu èrchidu s'est intèndiu in Rama,
unu prantu e atìtidus mannus;
Racheli prangit is fillus suus e no  bolit a dd'acunnortai, ca no funt prus.</text:p>
      <text:p text:style-name="P44">2,19 Mortu Erodi, Giusepi in Egitu iat bistu in bisu un'àngiulu de su Sennori</text:p>
      <text:p text:style-name="P45">2,20 chi dd'iat narau: «Pesa·ti·ndi, pigandi cun tui su pipiu e sa mama e bai a sa terra de Israeli; ca si funt mortus is chi boliant  bociri su pipiu.</text:p>
      <text:p text:style-name="P46">2,21 Issu, cumenti si ndi fiat pesau, iat pigau cun issu su pipiu e sa mama, e fiat torrau a sa terra de Israeli.</text:p>
      <text:p text:style-name="P47">
 2,22 Sendi ca iat scìpiu ca su rei de sa Giudea fiat Archelau in logu de su babbu Erodi, iat tìmiu a ddoi andai. Avèrtiu a pustis in unu bisu, si fiat arretirau a is regionis de sa Galilea</text:p>
      <text:p text:style-name="P48">2,23 e, cumenti fiat lòmpiu, fiat andau a bìviri in una citadi chi ddi narànt Nazaret, po chi si fessit cumpriu su chi iant narau is profetas: "S'at a narai Nazarenu"</text:p>
      <text:p text:style-name="P49">3,1 In cussas diis fiat arribbau Giuanni su Batista a predicai in su desertu de sa Giudea,</text:p>
      <text:p text:style-name="P50">3,2 narendi: «Cunvertei·sì, ca su rennu de is celus est acanta!»</text:p>
      <text:p text:style-name="P51">3,3 Est issu su chi iat annuntziau su profeta Isaia candu iat narau: 
Boxi de unu aboxinendi in su desertu:
Aprontai su caminu de su Sennori,
aderetzai is àndalas suas!
</text:p>
      <text:p text:style-name="P52">3,4 Giuanni fiat a besti de pilu de cammellu, cun una cintroxa de peddi in lumbus, papàt pibitziri e meli aresti. </text:p>
      <text:p text:style-name="P53">3,5 E acudiant a innui fiat issu de Gerusalemmi, de totu sa Giudea e de assoru a su Giordanu; </text:p>
      <text:p text:style-name="P54">3,6 e, cumenti cunfessànt is pecaus insoru, issu ddus batiàt in s'arriu Giordanu.
</text:p>
      <text:p text:style-name="P55">3,7 Ma biendi ca ddoi andant fariseus e sadduceus medas acudendi a si fàiri batiai, ddis iat narau: «Arratza de pìbaras!  Chini est chi bosi at narau a si fuiri de s'àiru chi est arribbendi?</text:p>
      <text:p text:style-name="P56">3,8 Fadei duncas frutus dinnus de cunversioni,</text:p>
      <text:soft-page-break/>
      <text:p text:style-name="P57">3,9 e no cretais de pòdiri narai intre bosàterus; Abramu est babbu nostu.  Bosi naru ca Deus ndi podit bogai fillus de Abramu fintzas de custas pedras.</text:p>
      <text:p text:style-name="P58"><text:s/>3,10 Sa seguri est giai posta in s'arrèxini de is matas: ònnia mata chi no donat frutus bonus si ndi segat e si nci ghetat a su fogu.
</text:p>
      <text:p text:style-name="P59">3,11 Deu megu de si batiai cun àcua po sa cunversioni; ma su chi est benendi infatu miu tenit prus poderi de mei e deu no seu dìnniu mancu de ddi portai is sàndulus; issu s'at a batiai in su Spìridu santu e in su fogu.
</text:p>
      <text:p text:style-name="P60">3,12 Issu portat su trebutzu me in manus, at a mundai s'àrgiola sua e at a incungiai su trigu in su stàulu, ma at a abruxai sa pula in unu fogu chi no si ndi morit».</text:p>
      <text:p text:style-name="P61">3,13 Insaras Gesùs fiat andau de Galilea a su Giordanu me innui/anca fiat Giuanni po si fàiri batiai de issu.</text:p>
      <text:p text:style-name="P62">3,14 Gianni perou ndi ddu boliat storrai, narendi: «Seu deu chi tengu abbisòngiu de mi fàiri batiai de tui e tui benis a ti fàiri batiai de mimi?».</text:p>
      <text:p text:style-name="P63">3,15 Ma Gesùs dd'iat narau: «Po immoi lassa fàiri, ca nosi cumbenit a cumpriri ònnia giustìtzia». E insaras Giuanni dd'iat lassau fàiri.
</text:p>
      <text:p text:style-name="P64">3,16 Apenas batiau, derutu Gesùs ndi fiat essiu de s'àcua; e ecu, si fiant abertus is celus e issu iat bistu su Spìridu de Deus calendi asuba sua cumenti a una columba. </text:p>
      <text:p text:style-name="P65">3,17 E mi’ una boxi de is celus narendi: «Custu est su fillu miu, su prus stimau, e de issu mi seu cumpraxu».</text:p>
      <text:p text:style-name="P66">4,1 E tandu su Spìridu nci iat portau a Gesùs a su desertu po ddu tentai su tiàulu. </text:p>
      <text:p text:style-name="P67">4,2 E a pustis chi iat giaunau coranta diis e coranta notis, dd'iat pigau fàmini.</text:p>
      <text:p text:style-name="P68">4,3 Su tentadori insandus si ddi fiat acostau e dd'iat narau: «Si ses (su) fillu de Deus, cumanda chi custas pedras si furrint a pani».</text:p>
      <text:p text:style-name="P69">4,4 Ma issu iat arrespustu: «Est scritu: No de pani sceti at a bìviri s'òmini, ma de ònnia fueddu chi essit/benit de sa buca de Deus».</text:p>
      <text:p text:style-name="P70">4,5 Tandus su tiàulu ndi dd'iat pigau a sa citadi santa, dd'iat postu asuba de sa punta de su tèmpiu</text:p>
      <text:p text:style-name="P71">4,6 e dd'iat narau: «Si ses Fillu de Deus, gheta·ti·nci a giossu¸ ca aici est scritu: Po tui at a cumandai/pretzetai is àngiulus suus, e issus t'ant a poderai cun is manus insoru, po chi su pei tuu no nci ferrat contras a una pedra».</text:p>
      <text:p text:style-name="P72">4,7 Gesùs dd'iat arrespustu: «Ddoi est scritu puru:
No tentis a su Sennori su Deus tuu».</text:p>
      <text:p text:style-name="P73">4,8 E su tiàulu nci dd'iat torrau a ingòlliri asuba de unu monti artu meda e dd'iat ammostau totu is rennus de su mundu e sa gròria insòru, e dd'iat narau:</text:p>
      <text:p text:style-name="P74">4,9 «Totu custas cosas t'apu a donai, si, ti nci ghetas a terra·e m'adoras».
</text:p>
      <text:p text:style-name="P75">4,10 Insaras Gesùs dd'iat narau: «Baiti·ndi Sàtana!
  Ca est scritu:
Adora a su Sennori, a su Deus tuu
e a issu sceti serbi».</text:p>
      <text:p text:style-name="P76">4,11 Insandus su tiàulu dd'iat lassau e ecu  àngiulus si ddi fiant acostaus  e ddu atendiant.</text:p>
      <text:p text:style-name="P77">4,12 Candu Gesùs iat scìpiu ca iant tentu a Giuanni, si fiat arretirau in Galilea</text:p>
      <text:p text:style-name="P78">4,13 e, lassau chi iat Nàzaret fiat andau a bìviri a Cafàrnau, in s'oru de mari, a is partis de Zàbulon e de Nèftali,
</text:p>
      <text:p text:style-name="P79">4,14 po chi si fessat cumpriu su chi iat annuntziau su profeta Isaia:
</text:p>
      <text:p text:style-name="P80">4,15 Sa terra de Zàbulon e sa terra de Nèftali, 
in sa bia de mari, addei/a s'àteru oru de su Giordanu, Galilea de is paganus:</text:p>
      <text:p text:style-name="P81">4,16 su pòpulu chi fiat in su iscuriu/in is tènebras
at bistu una luxi manna;
asuba de is chi fiant in sa terra e in s'umbra de sa morti
una luxi at obrèsciu.</text:p>
      <text:p text:style-name="P82">4,17 De insaras Gesùs iat cumentzau a predicai e a narai: «Cunvertei·sì, ca su rennu de is celus est acanta».
</text:p>
      <text:soft-page-break/>
      <text:p text:style-name="P83">4,18 Camminendi serrenti/oru oru de su mari de sa Galilea iat bistu a duus fradis, a Simoni, su chi ddi narànt a Pedru, e a Andria fradi suu, ghetendi s'arretza a mari, ca fiant piscadoris.
</text:p>
      <text:p text:style-name="P84">4,19 E ddis iat narau: «Sighei·mì, e bosi apu a fàiri a piscadoris de òminis».
</text:p>
      <text:p text:style-name="P85">4,20 E issus in deretura, lassadas is arretzas, dd'iant postu infatu.</text:p>
      <text:p text:style-name="P86">4,21 E sighendi ainnantis, iat bistu a àterus duus fradis, a Giacu de Zebedeu ea Giuanni su fradi, chi fiat in sa barca cun Zebedeu, su babbu, assetiendi is arretzas; e ddus iat tzerriaus.</text:p>
      <text:p text:style-name="P87">4,22 E issus illuegus, lassada sa barca e su babbu, dd'iant postu infatu.
</text:p>
      <text:p text:style-name="P88">4,23 E Gesùs andàt girendi/peri totu sa Galilea, donendi imparu in is sinagogas insoru e predichendi sa noa bona de su rennu e sanendi ònnia  maladia e ònnia mali malu in su pòpulu. </text:p>
      <text:p text:style-name="P89">4,24 E sa nomea sua si fiat spainada/spainàt in totu sa Sìria e po cussu nci ddi portànt totu is malàidus, trumentaus de ònnia arratza de maladia e dolori, indimoniaus, a/cun mali caducu e  màrturus; e issu ddus sanàt. 
</text:p>
      <text:p text:style-name="P90">4,25 E trumas mannas iant cumentzau a ddi pònniri infatu de Galilea, de sa Decàpoli, de Gerusalemmi, de Giudea e de s'àteru oru de su Giordanu.</text:p>
      <text:p text:style-name="P91">5,1 E biendi is trumas chi ddoi andànt, Gesùs nci fiat artziau a monti e, candu si fiat sètziu innia, si fiant acostaus a issu is discìpulus suus.
</text:p>
      <text:p text:style-name="P92">5,2 E pighendi su fueddu, ddis donàt imparu narendi:
</text:p>
      <text:p text:style-name="P93">5,3 «Biadus is pòburus in su spìridu, ca de issus est su rennu de is celus.</text:p>
      <text:p text:style-name="P94"><text:s/>5,4 Biadus is chi apenaus, ca ant a èssiri cunsolaus.</text:p>
      <text:p text:style-name="P95">5,5 Biadus is masedus, ca ant a eredai sa terra.</text:p>
      <text:p text:style-name="P96">5,6 Biadus is famius e sidius de giustìtzia, ca ant a èssiri pràndius.</text:p>
      <text:p text:style-name="P97">5,7 Biadus is misericordiosus, ca ant a agatai misericòrdia.</text:p>
      <text:p text:style-name="P98">5,8 Biadus is lìmpius de coru, ca ant a biri a Deus.</text:p>
      <text:p text:style-name="P99">5,9 Biadus is chi ponint paxi, poita ca ddis ant a narai fillus de Deus.</text:p>
      <text:p text:style-name="P100">5,10 Biadus is chi funt persighius po mori de sa giustìtzia, ca de issus est su rennu de is celus</text:p>
      <text:p text:style-name="P101">5,11 Biadus bosàterus candu bos'ant a ingiuriai, bos'ant a persighiri e, contendi su frassu, ant a narai ònnia arratza de mali contras a bosàterus po mori miu.
</text:p>
      <text:p text:style-name="P102">5,12 Alligrai·sì e afestai; ca manna est s'arrecumpensa de bosàterus in is celus.  Ca aici etotu ant persighiu is profetas innantis de bosàterus.</text:p>
      <text:p text:style-name="P103">5,13 Bosàterus seis su sali de sa terra; ma si su sali si torrat bambu, cun ita s'at a pòdiri torrai saliu?  No serbit prus a nudda sceti a  nci ddu fuliai a foras e a dd’apetigai is òminis.</text:p>
      <text:p text:style-name="P104">5,14 Bosàterus seis sa luxi de su mundu; una citadi posta in asuba de unu monti no fait a dda cuai,
</text:p>
      <text:p text:style-name="P105">5,15 e no s'alluit una làntia po dda pònniri asuta de su moju, ma in su candelobru po fàiri luxi a totu is chi funt me in domu.
</text:p>
      <text:p text:style-name="P106">5,16 Aici luxat sa luxi de bosàterus ananti a is òminis, po chi biant is òperas bonas de bosàterus e torrint glòria a Babbu bostu chi est in is celus.
</text:p>
      <text:p text:style-name="P107">5,17 No cretais/si fatzais su contu chi sia bènniu po annuddai/torrai a nudda sa Lei o is Profetas; no seu bènniu po ddas torrai a nudda, ma chi totu siat cumpriu.
</text:p>
      <text:p text:style-name="P108">5,18 In beridadi bosi naru: fintzas a candu ant a durai su celu e sa terra, no at a passai mancu unu puntu o unu sinnu de sa lei, innantis chi totu siat cumpriu.
</text:p>
      <text:p text:style-name="P109">5,19 Chini duncas no at arrespetai/tènniri in contu unu sceti de custus pretzetus, mancai su prus piticu, e at a imparai a is òminis a fàiri aici etotu, at a  èssiri cunsiderau su prus piticu in su rennu de is celus.  Ma chini ddus at a praticai e ddus at a imparai a is òminis, at a èssiri cunsiderau mannu in su rennu de is celus.</text:p>
      <text:p text:style-name="P110">5,20 Ca deu si naru: si sa giustìtzia de bosàterus no bincit sa de is scribas e de is fariseus, no eis a intrai in su rennu de is celus.
</text:p>
      <text:soft-page-break/>
      <text:p text:style-name="P111">5,21 Eis intèndiu ita iant narau a is antigus: No as a bociri; chini at a bociri at a èssiri giudicau in giudìtziu.</text:p>
      <text:p text:style-name="P112">5,22 Ma deu bosi naru, chini s'arrennegat cun su fradi, at a èssiri giudicau de su tribunali. . Chini narat a su fradi: tontu, at a èssiri giudicau de su sinèdriu; e chini ddi narat: macu, at a èssiri cundennau a su fogu de sa Geenna. </text:p>
      <text:p text:style-name="P113">5,23 Si duncas ses presentendi s'oferta tua in s'artari e innia t'arregordas ca fradi tuu tenit calincuna cosa contras a tui,
</text:p>
      <text:p text:style-name="P114">5,24 lassa innia su donu tuu ananti de s'artari e innantis bai a t'apaxiai cun fradi tuu e torrendi  presentas s'oferta tua.
</text:p>
      <text:p text:style-name="P115">5,25 Poni·tì luegus de acòrdiu cun su nimigu tuu candu ses in sa bia cun issu (conca a tribunali) no siat chi issu ti intreghit a su giùdixi e su giùdixi a sa guàrdia e ti nci ghetint a presoni.
</text:p>
      <text:p text:style-name="P116">5,26 In beridadi ti naru: no nd'as a essiri de innia fintzas a candu as a àiri pagau s'ùrtimu soddixeddu!
</text:p>
      <text:p text:style-name="P117">5,27 Eis intèndiu su chi s’est narau:
No fatzas adultèriu;
</text:p>
      <text:p text:style-name="P118">5,28 ma deu bosi naru: chini càstiat a una fèmina cun disìgiu, at giai fatu adultèriu cun issa in su coru suu.
</text:p>
      <text:p text:style-name="P119">5,29 Si s'ogu tuu de dereta ti fait fàiri scàndulu boga·ti·nde·ddu e scavula·nce·ddu atesu: poita ca ti cumbenit a pèrdiri unu de is mermus tuus, e no chi totu su corpus tuu nci arruat a sa Geenna.
</text:p>
      <text:p text:style-name="P120">5,30 E si sa manu dereta tua ti fait fàiri scàndulu, sega·ti·nde·dda e scavula·nce·dda atesu: est mellus po tui a nci pèrdiri unu de is mermus tuus, e no chi totu su corpus tuu nci arruat a sa Geenna.
</text:p>
      <text:p text:style-name="P121">5,31 S’est fintzas narau: Chini arrefudat a sa mulleri, ddi dongat s'atu de arrefudu;
</text:p>
      <text:p text:style-name="P122">5,32 ma deu si naru: chini arrefudat sa mulleri, francu chi no siat afanceddada, dda fait essiri adùltera e chini si cojat a una fèmina arrefudada, fait adultèriu.
</text:p>
      <text:p text:style-name="P123">5,33 Eis intèndiu fintzas chi iant narau a is antigus:
No giuris su frassu, ma cumpri a su Sennori is giuras tuas;
</text:p>
      <text:p text:style-name="P124">5,34 e deu bosi naru: no giureis po nudda: ni po su celu, ca est sa trona de Deus;</text:p>
      <text:p text:style-name="P125">5,35 ni po sa terra, ca est su scannu po is peis suus; ni po Gerusalemmi, ca est sa citadi de su grandu rei.
</text:p>
      <text:p text:style-name="P126">5,36 No giuris mancu po sa conca tua, ca no tenis su poderi de torrai canu o nieddu mancu unu pilu.
</text:p>
      <text:p text:style-name="P127">5,37 Siat intamis su fueddai de bosàterus ca eja, ca eja; ca no, no; su chi est in prus benit de su mali.
</text:p>
      <text:p text:style-name="P128">5,38 Eis intèndiu chi iant narau:
Ogu po ogu e denti po denti;</text:p>
      <text:p text:style-name="P129">5,39 ma deu si naru a no s'apònniri a su mali; antzis si unu ti donat una bussinada a sa trempa  dereta, tui apurri·ddi s'àtera puru.
</text:p>
      <text:p text:style-name="P130">5,40 e a chini ti bolit pònniri in pretu po ti ndi pigai sa tùnica, tui lassa·ddi su mantu puru.</text:p>
      <text:p text:style-name="P131">5,41 E a chini t'obbrigat a fàiri unu mìlliu, tui bai cun issu duus mìllius.
</text:p>
      <text:p text:style-name="P132">5,42 Dona a chini ti pedit e a chini bolit pigai a imprèstidu de tui no ddi furris is palas.
</text:p>
      <text:p text:style-name="P133">5,43 Eis intèndiu ca iant narau: As a stimai s'àtiri e as a odiai su nimigu tuu;</text:p>
      <text:p text:style-name="P134">5,44 ma deu bosi naru: stimai a is nemigus bostus e pregai po is chi bosi persighint,</text:p>
      <text:p text:style-name="P135">5,45 po chi siais fillus de su Babbu de bosàterus chi est in is celus chi fait essiri su soli suu asuba de malus e bonus, e fait pròiri asuba de is giustus e asuba de is chi no funt giustus.</text:p>
      <text:p text:style-name="P136">5,46 Ca si stimais a is chi bosi stimant, cali mèritu ndi teneis? No faint aici is pubblicanus puru? No faint aici is pubblicanus puru? </text:p>
      <text:soft-page-break/>
      <text:p text:style-name="P137">5,47 E si saludais sceti a fradis bostus, ita feis in prus?  Ellus no faint aici is paganus puru? </text:p>
      <text:p text:style-name="P138">5,48 Siais, duncas, bosàterus perfetus cumenti su Babbu bostu chi est in is celus est perfetu.
</text:p>
      <text:p text:style-name="P139">6,1 Castiai·(sì) de  praticai sa giustìtzia bosta ananti de is òminis po si fàiri biri de issus, desinuncas no eis a arriciri arrecumpèntzia de su Babbu bostu chi est in is celus.
</text:p>
      <text:p text:style-name="P140">6,2 E candu fais sa limùsina, no dd'annuntzis sonendi sa trumba, cumenti faint is ipòcritas me is sinagogas e in caminu po si fàiri abantai de is òminis. 
 In beridadi si naru: s'arrecumpèntzia insoru dd'ant giai pigada.</text:p>
      <text:p text:style-name="P141">6,3 Candu duncas sa limùsina ses faendi·dda tui, no scìpiat sa manu de manca tua ita est faendi sa dereta,</text:p>
      <text:p text:style-name="P142">6,4 po chi sa limùsina tua siat segreta; e su Babbu tuu, chi biit in su segretu, t'at a arrecunpentzai.
</text:p>
      <text:p text:style-name="P143">6,5 Candu pregais, no siais che a is ipòcritas chi ddis praxit a pregai strantaxu me is sinagogas me is arrenconis de is pratzas, po ddus biri is òminis.
 In beridadi si naru: s'arrecumpèntzia insoru dd'ant giai pigada.</text:p>
      <text:p text:style-name="P144">6,6 Tui, intamis, candu pregas, intra a s'aposentu tuu, e a genna serrada, prega a su Babbu tuu in segretu; e su Babbu tuu, chi biit in su segretu, t'at a arrecunpentzai.</text:p>
      <text:p text:style-name="P145">6,7 Candu pregais, no sperditzieis fueddus, cumenti faint is paganus, chi creint ca ddus ant a ascurtai a fortza de fueddus.</text:p>
      <text:p text:style-name="P146">6,8 No siais duncas che a issus, ca su Babbu bostu sciit de ita s'abbisòngiat innantis de si ddu pediri.
</text:p>
      <text:p text:style-name="P147">6,9 E tandu bosàterus pregai aici: Babbu nostu chi ses in is celus, santificau siat su nòmini tuu;
</text:p>
      <text:p text:style-name="P148">6,10 bengat su rennu tuu; siat fata sa voluntadi tua, cumenti in is celus aici in sa terra.
</text:p>
      <text:p text:style-name="P149">6,11 Dona·sì oi su pani nostu de ònnia dii,</text:p>
      <text:p text:style-name="P150"><text:s/>6,12 e perdona is depidus nostus cumenti nosu ddus perdonaus a is depidoris nostus,
</text:p>
      <text:p text:style-name="P151">6,13 e no si sbandonis/lassis in sa tentatzioni, ma lìbera·sì de su mali.
</text:p>
      <text:p text:style-name="P152">6,14 Ca si bosàterus perdonais a is òminis is pecaus insoru, su Babbu bostu de is celus at a perdonai is pecaus bostus;
</text:p>
      <text:p text:style-name="P153">6,15 ma si bosàterus no perdonais a is òminis, mancu su Babbu bostu at a perdonai is pecaus bostus.
</text:p>
      <text:p text:style-name="P154">6,16 E candu giaunais, no siais annugiaus cumenti a is ipòcritas, ca si sbisuriant sa faci po fàiri biri a is òminis ca funt giaunendi. 
 In beridadi si naru: s'arrecumpèntzia insoru dd'ant giai pigada.</text:p>
      <text:p text:style-name="P155">6,17 Intamis tui, candu giaunas, ungi·tì sa conca e sciacua·tì sa faci,</text:p>
      <text:p text:style-name="P156">6,18 po chi sa genti no biat ca ses giaunendi, ma sceti Babbu tuu chi est in su segretu; e Babbu tuu, chi biit in su segretu, t'at a arrecumpentzai.
</text:p>
      <text:p text:style-name="P157">6,19 No ammuntoneis po bosàterus tesorus in sa terra, innui tìngia e arruina distruint e aundi is furonis intrant e furant;
</text:p>
      <text:p text:style-name="P158">6,20 ammuntonai prusaprestu tesorus in celu, innui ni tìngia ni arruina sperdint,e innui furonis no intrant e no furant.
</text:p>
      <text:p text:style-name="P159">6,21 Poita ca aundi est su tesoru tuu, innia at a èssiri su coru tuu.</text:p>
      <text:p text:style-name="P160">6,22 Sa làntia de su corpus est s'ogu; si s'ogu tuu est sanu, totu su corpus tuu at a èssiri in sa luxi;
</text:p>
      <text:p text:style-name="P161">6,23 ma si s'ogu tuu est malu, totu su corpus tuu at a èssiri scuriosu  (prenu de scuriori). 
 Si sa luxi chi est aintru de tuu est scuriori, cantu at a èssiri mannu su scuriori!</text:p>
      <text:p text:style-name="P162">6,24 Nemus podit serbiri a duus meris: o at a tènniri in òdiu a s'unu e at a stimai a s'àteru, o at a preferriri a s'unu e at a dispretziai a s'àteru: no podeis serbiri a Deus e a mammona.
</text:p>
      <text:soft-page-break/>
      <text:p text:style-name="P163">6,25 Po custu bosi naru: no siais in pentzamentu po sa vida de bosàterus po su chi eis a papai o a bufai, e mancu po su corpus de bosàterus pensendi cumenti s'eis a bestiri; e ita sa vida no si balit fortzis prus de su papai e su corpus prus de su bestiri?
</text:p>
      <text:p text:style-name="P164">6,26 Castiai is pillonis de celu: no ddoi seminant, no messant, no incungiant in is stàulus; epuru su Babbu bostu de is celus ddis donat a papai. 
 No contais fortzis prus de issus?</text:p>
      <text:p text:style-name="P165">6,27 Chini de bosàterus, po cantu fatzat, podit aciùngiri mancai pagu a sa vida sua?
</text:p>
      <text:p text:style-name="P166">6,28 E poita si pighais pentzamentu po su bestiri?  Castiai cumenti crescint is lillus de su sartu: no traballant e no filant.</text:p>
      <text:p text:style-name="P167">6,29 Epuru deu bosi naru ca mancu Salomoni, cun totu sa glòria chi teniat, si bestiat che a unu de issus.
</text:p>
      <text:p text:style-name="P168">6,30 Duncas si Deus dda bestit aici s'erba de su campu, chi oi nci est e cras nci dda ghetant a su forru, ellus no at a fàiri meda de prus po bosàterus, genti de pagu fidi?
</text:p>
      <text:p text:style-name="P169">6,31 Po custu no si pongais pentzamentu narendi: Ita eus a papai? 
 Ita eus a bufai?  Ita s'eus a pònniri?</text:p>
      <text:p text:style-name="P170">6,32 Totu custas cosas ponint in pentzamentu is paganus; su Babbu bostu chi est in is celus ddu sciit ca ndi teneis abbisòngiu.
</text:p>
      <text:p text:style-name="P171">6,33 A primu circai su rennu de Deus e sa giustìtzia sua, e totu custas cosas si ddas ant a donai in aciunta.
</text:p>
      <text:p text:style-name="P172">6,34 No si pongais in pentzamentu po s'incràs, ca s'incràs at a tènniri giai is pentzamentus suus. 
 A ònnia dii ddi bastat sa pena sua. </text:p>
      <text:p text:style-name="P173">7,1 No giudicheis, po chi no siais giudicaus/po no èssiri giudicaus;


</text:p>
      <text:p text:style-name="P174">7,2 ca cun su giudìtziu chi giudicais eis a èssiri giudicaus, e cun sa mesura chi mesurais/medeis eis a èssiri mesuraus.
</text:p>
      <text:p text:style-name="P175">7,3 Poita càstias sa àstula in s'ogu de fradi tuu, e no ti ndi sapis de sa biga chi portas in s'ogu tuu?</text:p>
      <text:p text:style-name="P176">7,4 O cumenti as a pòdiri narai a fradi tuu: «Lassa ca ti ndi bogu s'àstula de s'ogu, e in s'ogu tuu ddoi est una/sa biga?»</text:p>
      <text:p text:style-name="P177">7,5 Ipòcrita/frassu, boga·ti·ndi innantis sa biga de s'ogu e a pustis as a biri mellus po ndi bogai s'àstula de s'ogu de fradi tuu.</text:p>
      <text:p text:style-name="P178">7,6 No doneis sa cosa santa a is canis e no gheteis is prellas bostas ananti de is procus, po chi no ddas apetighint e si furrint contras a bosàterus po si fàiri a arrogus.</text:p>
      <text:p text:style-name="P179">7,7 Pedei e bosi ant a donai, circai e eis a agatai: tocai a sa genna e bosi ant a abèrriri </text:p>
      <text:p text:style-name="P180">7,8 ca chini pedit arricit, e chini circat agatat e a chini tocat a sa genna dd'ant a abèrriri.</text:p>
      <text:p text:style-name="P181">7,9 Chini de bosàterus a su fillu chi ddi pedit pani dd'at a donai una pedra?</text:p>
      <text:p text:style-name="P182">7,10 Opuru si ddi pedit unu pisci, dd'at a donai unu pìbera?</text:p>
      <text:p text:style-name="P183">7,11 Si bosàterus chi seis malus scieis donai cosas bonas a fillus bostus, cantu prus su Babbu bostu chi est in is celus at a donai cosa bona a is chi si dda pedint!</text:p>
      <text:p text:style-name="P184">7,12 Totu su chi boleis chi is òminis fatzant a bosàterus, bòsàterus puru feide·ddu a issus: custa difatis est sa Lei e is Profetas/ Fei a is àterus totu su chi boleis chi issus fatzant a bosàterus/bosi fatzant:</text:p>
      <text:p text:style-name="P185">7,13 Intrai de sa genna strinta, ca larga est sa genna e amprosa est sa bia chi portat a sa perditzioni, e medas funt is chi intrant de innia;</text:p>
      <text:p text:style-name="P186">7,14 cantu est pitica/ita pitica chi est sa genna e strinta sa bia chi portat a sa vida, e cantu pagus funt is chi dd'agatant!
</text:p>
      <text:p text:style-name="P187">7,15 Aturai atentus a is profetas frassus chi benint anca seis bosàterus a bisura de brebeis, ma aintru funt lupus abramius.</text:p>
      <text:p text:style-name="P188">7,16 De is frutus/òperas insoru ddus eis a connòsciri. Ellus, s’àxina de mesu de sa spina, o si boddit figu de mesu de su cardu?
</text:p>
      <text:soft-page-break/>
      <text:p text:style-name="P189">7,17 Aici etotu ònnia mata bona bogat/donat frutus bonus e ònnia mata mala donat/betit frutus malus;</text:p>
      <text:p text:style-name="P190">7,18 una mata bona no podit bogai frutus malus, ni una mata mala podit donai frutus bonus.
</text:p>
      <text:p text:style-name="P191">7,19 Ònnia mata chi no bogat frutus bonus ndi dda segant e nci dda ghetant a su fogu.</text:p>
      <text:p text:style-name="P192">7,20 Duncas ddus connòsceis de is frutus insoru.</text:p>
      <text:p text:style-name="P193">7,21 No totus is chi mi narant Sennori, Sennori, ant a intrai in su rennu de is celus, ma su chi /chini fait sa voluntadi de su Babbu miu chi est in is celus.</text:p>
      <text:p text:style-name="P194">7,22 Sa dii medas m'ant a narai: «Sennori, Sennori, ellus no eus profetitzau in nòmini tuu e nci eus bogau dimònius in nòmini tuu e fatu meda òperas poderosas/miràculus in nòmini tuu?»</text:p>
      <text:p text:style-name="P195">7,23 Deu perou ddis apu a narai/acrarai: No bosi apu mai connotu; stesiai·si·nci de assoru miu, bosàterus chi no praticais sa voluntadi de Deus/ chi feis cosa foras de lei.</text:p>
      <text:p text:style-name="P196">7,24 Po custu chini ascurtat custas paràulas mias e ddas ponit in pràtica, est che a un'òmini sàbiu chi s'at fatu sa domu asuba de sa perda/arroca.</text:p>
      <text:p text:style-name="P197">7,25 Iat atacau a pròiri, ndi fiant bessius is arrius, iant sulau/tirau is bentus e nci fiant infrusaus contras a sa domu, e cussa no ndi fiat arruta, ca teniat is fundamentas in sa perda/s'arroca.</text:p>
      <text:p text:style-name="P198">7,26 Chini ascurtat custas paràulas mias e no ddas ponit in pràtica est cumenti a un’òmini tontu chi s’at fatu sa domu in s’arena.</text:p>
      <text:p text:style-name="P199">7,27 Iat atacau a pròiri, ndi fiant essius is arrius, iant tirau is bentus e nci fiant infrusaus contras a sa domu, e ndi fiat arruta e manna fiat s’arruina sua»</text:p>
      <text:p text:style-name="P200">7,28 Candu Gesùs iat acabau de fueddai, sa genti fiat abarràt spantada de sa dotrina sua:</text:p>
      <text:p text:style-name="P201">7,29 Difatis issu ddis imparat cumenti a unu chi tenit autoridadi e no cumenti a is scribas insoru.</text:p>
      <text:p text:style-name="P202">8,1 Candu Gesùs ndi fiat calau de su monti, genti meda ddi poniat in fatu.</text:p>
      <text:p text:style-name="P203">8,2 E fiat bènniu unu lebbrosu chi si fiat ingenugau ananti suu narendi: «Sennori, si bolis, tui mi podis purificai».</text:p>
      <text:p text:style-name="P204">8,3 E Gesùs iat allonghiau sa manu e dd'iat tocau narendi: «Eja bollu, chi sias purificau».  E in deretura sa lebbra ddi fiat sparèssia.</text:p>
      <text:p text:style-name="P205">8,4 A pustis Gesùs dd'iat narau: «Castia de no ndi fueddai cun nemus, ma bai e presenta·tì  a su sacerdotu,  ammosta·ddi sa purificatzioni tua e oferri·dda a testimonia po issus cumenti iat cumandau Mosè».</text:p>
      <text:p text:style-name="P206">8,5 Intrau (chi fiat) a Cafarnau, si ddi fiat acostiau unu centurioni preghendide·ddu:</text:p>
      <text:p text:style-name="P207">8,6 «Sennori, su serbidori miu est corcau in domu màrturu e sunfrendi meda».</text:p>
      <text:p text:style-name="P208">8,7 Gesùs dd'iat arrespustu: «Apu a andai e dd'apu a sanai».</text:p>
      <text:p text:style-name="P209"><text:s/>8,8 E su centurioni iat sighiu: « Sennori, deu no seu dìnniu chi tui intris a domu mia, nara unu fueddu/paràula sceti e su serbidori miu s'at a sanai.</text:p>
      <text:p text:style-name="P210">8,9 Ca deu puru, mancai sia a cumandu allenu, portu sordaus a cumandu miu e ddi naru a unu: Bai, e issu andat, e a un'àteru; Beni, e issu benit, e a su serbidori miu: Fai custu, e issu ddu fait».</text:p>
      <text:p text:style-name="P211">8,10 Intendendi cussu, Gesùs ndi fiat abarrau spantau e ddis iat narau a is chi ddu sighiant/poniant in fatu: ­«In beridadi bosi naru, in Israeli no apu agatau a nemus cun una fidi a</text:p>
      <text:p text:style-name="P212">8,11 Bosi naru ca medas ant a bènniri de orienti e de ocidenti e s'ant a sètziri in sa mesa cun Abramu, Isacu e Giacobu in su rennu de is celus,</text:p>
      <text:p text:style-name="P213">8,12 candu/ma a is fillus de su rennu nci ddus ant a bogai a foras a su scuriu, innui ddoi at a àiri prantu e tzirrìchiu de dentis­».</text:p>
      <text:p text:style-name="P214"> 
 8,13 E Gesùs dd'iat narau a su centurioni: «Bai, e chi ti siat fatu cunforma a  sa fidi tua».  E in deretura su serbidori fiat sanau.</text:p>
      <text:soft-page-break/>
      <text:p text:style-name="P215">
8,14 Gesùs fiat intrau a sa domu de Pedru, iat bistu a sa sorga de Pedru corcada a calentura.
</text:p>
      <text:p text:style-name="P216">8,15 Dd'iat tocau sa manu e sa calentura ddi fiat sparèssia; a pustis issa si ndi fiat pesada e si fiat posta a dd'atèndiri.</text:p>
      <text:p text:style-name="P217">8,16 E a scurigadroxu, ndi dd’iant betiu indimoniaus medas e issu nci bogat is spìridus cun una paràula sua e iat sanau totu is malàdius.</text:p>
      <text:p text:style-name="P218">8,17 Aici chi siat cumpriu su chi iat annuntziau su profeta Isaia: Issu s'at pigau is maladias nostas e s'at carrigau/atuau is malis nostus.
</text:p>
      <text:p text:style-name="P219">8,18 E biendi Gesùs genti meda a fùrriu/ingìriu suu, iat cumandau a nci passai a s'àteru oru de su mari.</text:p>
      <text:p text:style-name="P220">8,19 Tandus unu scriba si fiat acostau e dd'iat narau: «Maistu, deu t'apu a sighiri a innui siat chi andis.</text:p>
      <text:p text:style-name="P221">8,20 E Gesùs ddiat arrespustu: ­­«Is mraxanis tenint is coilis/tanas e is pillonis de celu is nius insoru, ma su Fillu de s'òmini no tenit a innui imbarai sa conca».</text:p>
      <text:p text:style-name="P222">8,21 E un'àteru de is discìpulus dd'iat naru:«Sennori, innantis lassa·mi andai a nci interrai a babbu miu».</text:p>
      <text:p text:style-name="P223">8,22 E Gesùs ddiat 'arrespustu: «Poni in fatu a mei e lassa chi is mortus nci interrint is mortus insoru».
</text:p>
      <text:p text:style-name="P224">8,23 Cumenti fiat pesau a una barca, is discìpulus suus dd'iant postu in fatu.</text:p>
      <text:p text:style-name="P225">8,24 E tondinduna si fiat pesada in mari una grandu strasura de bentu tanti chi sa barca fiat prena de s'àcua de is undas, ma issu fiat dromiu.
</text:p>
      <text:p text:style-name="P226">8,25 E si fiant acostiaus a issu e ndi dd'iant scidau narendi: «Sarva·sì, Sennori, innoi si moreus/seus pèrdius!».</text:p>
      <text:p text:style-name="P227">8,26 E issus ddis iat narau: «Poita est chi timeis, òminis de pagu fidi?». E pesendi·si·ndi, iat certau a is bentus e a su mari e fiat lòmpia una bonantza manna.</text:p>
      <text:p text:style-name="P228"><text:s/>8,27 E cussus òminis fiant abarraus spantaus e narànt: «Ellus e chini est custu, chi fintzas is bentus e su mari ddi ponint in menti?».</text:p>
      <text:p text:style-name="P229">8,28 E candu fiat lòmpiu a s'àteru oru, in su logu de is Gadarenus, duus indimoniaus, essendi·ndi de is tumbas, dd'iant atobiau; fiant arrennegaus meda tantis chi nemus podiat prus passai in cussa bia.</text:p>
      <text:p text:style-name="P230">8,29 Iant cumentzau a aboxinai: «Ita nci intraus nosu cun tui/Ita ses circhendi·sì, Fillu de Deus?
 Ses bènniu a innoi innantis de s'ora a si trumentai?».</text:p>
      <text:p text:style-name="P231">8,30 A pagu tretu/Addei de issu ddoi iat unu tallu mannu de procus pascendi.</text:p>
      <text:p text:style-name="P232">8,31 E is dimònius ddu impetrànt: «Chi si nci bogas, manda·sì·nci a cussu tallu».</text:p>
      <text:p text:style-name="P233">8,32 E issu ddis iat narau: «Baxei/Andai!».  E issus, ndi essiant de is corpus de is òminis e nci intrànt in su de is procus: e totu su tallu si nci spentumànt e si fiant mortus in is caddarigas de mari.</text:p>
      <text:p text:style-name="P234">8,33 Tandus is procaxus si fiant fuius e fiant intraus a sa citadi e iant contau ònnia cosa e (fintzas)  su fatu de is indimoniaus.</text:p>
      <text:p text:style-name="P235">8,34 Totu sa citadi insaras nci fiat essia a atobiai a Gesùs e, biendi·ddu, dd'iant impetrau chi si nci stesiessit de sa terra insoru.


</text:p>
      <text:p text:style-name="P236">9,1 Gesùs nci fiat artziau a una barca, nci fiat passau a s'àteru oru e fiat lòmpiu a sa citadi sua.</text:p>
      <text:p text:style-name="P237">9,2 E luegus, dd'iant portau unu màrturu corcau in una stoja. Gesùs, biendi sa fidi insoru, iat narau a su màrturu: «Fai·tì coràgiu, fillu miu, is pecaus tuus ti funt perdonaus».</text:p>
      <text:p text:style-name="P238">9,3 E tandus unus cantu scribas iant cumentzau a pentzai: «Custu est frastimendi».</text:p>
      <text:p text:style-name="P239">9,4 Gesùs perou, connoscendi is pentzamentus insoru, iat narau: «Poita est chi pentzais cosas malas in su coru de bosàterus?</text:p>
      <text:p text:style-name="P240">9,5 E ita est duncas prus fàcili a narai: Is pecaus ti funt perdonaus, opuru a narai: Pesa·ti·ndi e camina?</text:p>
      <text:p text:style-name="P241">9,6 Immoi, po chi scipiais ca su Fillu de s'òmini tenit in sa terra s'autoridadi de perdonai is pecaus: pesa·ti·ndi, iat narau a su màrturu, piga·ndi sa stoja e bai a domu tua».</text:p>
      <text:p text:style-name="P242">9,7 E issu si ndi fiat pesau e si ndi fiat andau a domu sua.</text:p>
      <text:soft-page-break/>
      <text:p text:style-name="P243">9,8 Biendi custu, sa genti iat tìmiu e iat torrau glòria a Deus chi iat donau unu poderi aici mannu a is òminis.</text:p>
      <text:p text:style-name="P244">9,9 Andendi·si·ndi de innia, Gesùs iat bistu a un'omini chi ddi narànt Mateu, sètziu in su bangu de is tributus, e dd'iat narau «Sighi·mì».  E issu si ndi fiat pesau e dd'iat postu infatu.</text:p>
      <text:p text:style-name="P245">9,10 E Gesùs fiat sètziu in sa mesa me in sa domu, candu funt aproillaus unu bellu tanti de publicanus e pecadoris e si fiant postus in sa mesa impari  a is discìpulus.</text:p>
      <text:p text:style-name="P246">9,11 Biendi custu, is fariseus narànt a is discìpulus suus: «Poita su maistu de bosàterus papat impari a is publicanus e a is pecadoris?».</text:p>
      <text:p text:style-name="P247">9,12 E Gesùs ddus iat intèndius e iat narau: «No funt is sanus chi tenint abbisòngiu de su mèigu, ma is malàidus.</text:p>
      <text:p text:style-name="P248">9,13 Baxei duncas e imparai ita bolit narai: Misericòrdia deu bollu e no sacrifìtziu. Difatis no seu bènniu po is giustus, ma po is pecadoris».</text:p>
      <text:p text:style-name="P249">9,14 E insaras si ddi fiant acostiaus is discìpulus de Giuanni e dd'iant preguntau: «Poita est, chi nosu e is fariseus giaunaus meda, e is discìpulus tuus no giaunant?».</text:p>
      <text:p text:style-name="P250">9,15 E Gesùs ddis iat narau: «Podint fortzis is amigus de is cumbidaus a una coja èssiri in corrutu impetantis chi su sposu est cun issus?  Ant a bènniri diis candu su sposu si ndi dd'ant a leai e tandus ant a giaunai.</text:p>
      <text:p text:style-name="P251">9,16 Nemus còsit unu tzàpulu de pannu a unu bestiri bèciu, ca su tzàpulu nou scòrriat su bestiri e su stampu essit peus.</text:p>
      <text:p text:style-name="P252">9,17 E no si ponit su binu nou in is udris bècius, ca is udris si crepant e su binu ndi essit e is udris funt pèrdias.  Ma su binu nou si ponit in udris nous, e aici s'unu e s'àteru no si perdint».</text:p>
      <text:p text:style-name="P253">9,18 Impetantis chi fiat narendi custu, fiat arribbau unu capu chi si fiat ingenugau ananti suu e dd'iat narau: «Filla mia s'est morta immoi·immoi; ma beni, poni·ddi sa manu tua asuba e issa at a torrai a bìviri».
</text:p>
      <text:p text:style-name="P254">9,19 E pesendi·si·ndi·Gesùs dd'iat postu infatu, e is discìpulus suus puru.
</text:p>
      <text:p text:style-name="P255">9,20 E ecu a una fèmina, chi fiat doxi annus perdendi sànguni, si fiat acostiada a issu de apalas e dd'iat tocau s'oru de su manteddu.
</text:p>
      <text:p text:style-name="P256">9,21 E difatis pentzàt: «Si ddi tocu sceti  su manteddu, apu a èssiri sanada».
</text:p>
      <text:p text:style-name="P257">9,22 Gesùs, si fiat furriau, dd'iat bista e dd'iat narau: «Coràgiu, filla mia, sa fidi tua t'at sanau». 
 E de insaras sa fèmina fiat sanada.</text:p>
      <text:p text:style-name="P258">9,23 E candu Gesùs fiat lòmpiu a sa domu de su capu biendi is sonadoris e sa genti in avolotu, iat narau:
</text:p>
      <text:p text:style-name="P259">9,24 «Arretirai·sì, ca sa piciochedda no est morta, ma est dromia». 
 E issus si nd'arriiant.</text:p>
      <text:p text:style-name="P260">9,25 E candu nci iant bogau sa genti a foras fiat intrau issu, dd'iat pigau sa manu e sa piciochedda si ndi fiat pesada.
</text:p>
      <text:p text:style-name="P261">9,26 E sa nova si fiat spartzinada apetotu cussa regioni.
</text:p>
      <text:p text:style-name="P262">9,27 E candu Gesùs fiat mòviu de innia, ddu sodigànt duus tzurpus aboxinendi: «Fillu de Dàvidi, teni piedadi de nosu».</text:p>
      <text:p text:style-name="P263">9,28 E intrau a domu, is tzurpus si fiant acostiaus, e Gesùs ddis iat narau: «Bosàterus creeis chi potza fàiri custu?». 
 Dd'iant arrespustu: «Sissi, o Sennori!».</text:p>
      <text:p text:style-name="P264">9,29 Insaras iat tocau is ogus insoru narendi: « Siat fatu a bosàterus segundu sa fidi bosta».
</text:p>
      <text:p text:style-name="P265">9,30 E is ogus insoru si fiant abertus.  E Gesùs ddus ammonestat narendi: «Castiai chi no ddu scìpiat nemus!».
</text:p>
      <text:p text:style-name="P266">9,31 Ma issus, cumenti nci fiant essius, iant spartzinau sa nomea sua in totu cussa regioni.</text:p>
      <text:p text:style-name="P267">9,32 Impetantis chi cuddus nci essiant, nci dd'iant portau a un'òmini mudu indimoniau.</text:p>
      <text:p text:style-name="P268">9,33 E bogau su dimòniu, su mudu iat atacau a chistionai e sa genti si spantada narendi: «Una cosa aici in Israeli fiaus ancora a dda biri!».</text:p>
      <text:soft-page-break/>
      <text:p text:style-name="P269">9,34 Ma is fariseus narànt: «Issu nci bogat is dimònius po mèdiu/po òpera de su prìncipi de is dimònius».</text:p>
      <text:p text:style-name="P270">9,35 Gesùs andàt girendi totu is citadis e is biddixeddas, imparendi in is sinagogas insoru, predichendi s'evangèliu de su Rennu e curendi ònnia maladia e infermidadi.</text:p>
      <text:p text:style-name="P271">9,36 Biendi is trumas de genti nd'iat tentu làstima, ca fiant fadiadas e disimparadas, che a brebeis chene pastori.</text:p>
      <text:p text:style-name="P272">9,37 Insaras iat narau a is discìpulus suus: «Su lori est meda, ma is messadoris funt pagus!».</text:p>
      <text:p text:style-name="P273">9,38 Pregai·de·ddu, duncas, a su meri de su lori, chi mandit messadoris a su lori suu!».</text:p>
      <text:p text:style-name="P274">10,1 E issu tzerriau chi iat acanta sua a is doxi discìpulus suus, ddis iat donau autoridadi asuba de is spìridus malus po nci ddus bogai e po sanai ònnia casta de maladia e de mali.</text:p>
      <text:p text:style-name="P275">10,2 I nòminis de is doxi apòstulus funt custus: su primu, Simoni, su chi narant Pedru e Andria, fradi suu; Giagu de Zebedeu e Giuanni su fradi,</text:p>
      <text:p text:style-name="P276">10,3 Filipu e Bartumeu, Tomasu e Mateu su publicanu, Giagu de Alfeu e Taddeu,</text:p>
      <text:p text:style-name="P277">10,4 Simoni su Cananeu e Giudas s'Iscariota, su chi dd'at fintzas traixu.</text:p>
      <text:p text:style-name="P278">10,5 A custus doxi Gesùs ddus iat mandaus e ddis iat pretzetau: «No andeis a innui funt is paganus e no intreis in peruna citadi de Samaritanus:</text:p>
      <text:p text:style-name="P279">10,6 prus a prestu baxei faci a is brebeis pèrdias de sa domu de Israeli.</text:p>
      <text:p text:style-name="P280">10,7 E andendi·andendi, annuntziai ca su rennu de is celus est acanta.</text:p>
      <text:p text:style-name="P281">10,8 Sanai a is malàidus, arresuscitai is mortus, sanai is lebrosus, bogai·nci is dimònius. . A indonu eis arriciu, a indonu donai</text:p>
      <text:p text:style-name="P282">10,9 No bosi pigheis oru, ni prata, ni dinai de arràmini in is singeddus de bosàterus,</text:p>
      <text:p text:style-name="P283">10,10 ni bèrtula de viàgiu, ni duas tùnicas, ni sàndulus, ni matzucu, ca s'operaju est dìnniu de su nutrimentu suu.</text:p>
      <text:p text:style-name="P284">10,11 A cali si siat citadi o bidda intreis, fei·sì inditai si ddoi at calincuna persona dìnnia, e abarrai·ddoi fintzas a candu eis a mòviri.</text:p>
      <text:p text:style-name="P285">10,12 Intrendi a sa domu, saludai.</text:p>
      <text:p text:style-name="P286"><text:s/>10,13 Si cussa domu est dìnnia, sa paxi de bosàterus bengat asuba de issa; ma si no est dìnnia, sa paxi bosta torrit a bosàterus.</text:p>
      <text:p text:style-name="P287">10,14 Si calincunu no bosi arricit e no ascurtat is paràulas de bosàterus, esseide·ndi de cussa domu o de cussa citadi e scutulai·si·ndi su prùini de is peis.
</text:p>
      <text:p text:style-name="P288">10,15 In beridadi bosi naru, in sa dii de su giudìtziu at a èssiri prus pagu grai po sa terra de Sòdoma e de Gomorra chi no po cussa citadi.</text:p>
      <text:p text:style-name="P289">10,16 Mirai: deu si mandu cumenti a brebeis in mesu a is lupus; siais duncas avèrtius cumenti a is colorus e simplis che a columbas.</text:p>
      <text:p text:style-name="P290">10,17 Castiai·sì de is òminis, ca bos'ant a intregai a is tribunalis insoru e bos'ant a aciotai in is sinagogas insoru;
</text:p>
      <text:p text:style-name="P291">10,18 e si nci ant portai ananti a is guvernadoris e a is reis po mori miu, po donai testimonia a issus e a is paganus.</text:p>
      <text:p text:style-name="P292">10,19 E candu bos'ant a intregai, no s'arrioleis po cumenti o de ita eis a narai, ca su de narai bosi dd’ant a consillai tandu:</text:p>
      <text:p text:style-name="P293">10,20 difatis no seis bosàterus chi seis fueddendi, ma est su Spìridu de su Babbu bostu chi fueddat in bosàterus.</text:p>
      <text:p text:style-name="P294">10,21 Su fradi at a intregai a sa morti su fradi e su babbu a su fillu. E e is fillus s’ant a furriai contras a su babbu e a sa mama e ddus ant a fàiri bociri. </text:p>
      <text:p text:style-name="P295">10,22 A bosàterus bosi ant a tènniri in òdiu totus po mori de su nòmini miu, ma chini at a aguantai fintzas a s’acabbu at a èssiri sarvau.</text:p>
      <text:p text:style-name="P296">10,23 Candu bosi persighint in una citadi, fuei·sì a un'àtera; in beridadi bosi naru: no eis a àiri acabbau de nci passai in is citadis de Israeli, innantis chi bengat su Fillu de s'òmini.</text:p>
      <text:soft-page-break/>
      <text:p text:style-name="P297">10,24 Unu discìpulu no est prus de su maistu, ni unu serbidori prus de su meri;</text:p>
      <text:p text:style-name="P298">10,25 a su discìpulu ddi bastat a èssiri che a su maistu e a su serbidori che a su meri. 
 Si a su meri de domu dd’ant postu a nòmini Beelzebùl, peus puru a is de domu sua!</text:p>
      <text:p text:style-name="P299">10,26 No ddis timais; poita ca no ddoi at nudda cuau chi no at a èssiri scobertu, e nudda de segretu chi no at a èssiri connotu.</text:p>
      <text:p text:style-name="P300">10,27 Su chi bosi naru in su scuriu narai·ddu in sa luxi, e su chi ascurtais a s'origa aboxinaide·ddu de is crobeturas.</text:p>
      <text:p text:style-name="P301">10,28 E no timais a is chi bocint su corpus, ma no tenint su poderi de bociri s'ànima; timei prus a prestu su chi tenit su poderi de portai a sa perditzioni/fàiri pèrdiri s'ànima e su corpus in sa Geenna.</text:p>
      <text:p text:style-name="P302">10,29 No si bendint fortzis duus cruculeus po unu soddu?  E mancai aici nissciunu de issus nci at a arrùiri a terra chene Babbu bostu.</text:p>
      <text:p text:style-name="P303">10,30 E bosàterus, po fintzas is pilus de conca funt totu contaus;</text:p>
      <text:p text:style-name="P304">10,31 no timais duncas: bosàterus baleis prus de medas cruculeus!</text:p>
      <text:p text:style-name="P305">10,32  Chini m'at a arreconnòsciri ananti a is òminis, deu puru dd'apu a arreconnòsciri ananti a su Babbu miu chi est in is celus;</text:p>
      <text:p text:style-name="P306">10,33 ma chini m'at a dennegai ananti a is òminis, aici etotu dd'apu a dennegai ananti a su Babbu miu chi est in is celus.</text:p>
      <text:p text:style-name="P307">10,34 No si cretais ca seu bènniu a betiri paxi in sa terra; no seu bènniu a betiri paxi, ma una spada.</text:p>
      <text:p text:style-name="P308">10,35 Difatis seu bènniu a pònniri su fillu contras a su babbu, sa filla contras a sa mama, sa nura contras a sa sorga:</text:p>
      <text:p text:style-name="P309">10,36 e is nimigus de s'òmini ant a èssiri is de domu sua etotu.</text:p>
      <text:p text:style-name="P310">10,37 Chini stimat a su babbu o a sa mama prus de mei no est dìnniu de mei; chini stimat a su fillu o sa filla prus de mei no est dìnniu de mei;</text:p>
      <text:p text:style-name="P311">10,38 chini no s'atuat sa gruxi sua e no mi ponit infatu, no est dìnniu de mei.</text:p>
      <text:p text:style-name="P312">10,39 Chini at a àiri agatau sa vida sua, dd'at a pèrdiri: e chini at a àiri pèrdiu sa vida sua po mori mia, dd'at a agatai.</text:p>
      <text:p text:style-name="P313">10,40 Chini arricit a bosàterus arricit a mei, e chini arricit a mei arricit a chini m'at mandau.</text:p>
      <text:p text:style-name="P314">10,41 Chini arricit a unu profeta che profeta, at òtenniri s'arrecumpentza de su profeta, e chini arricit a unu giustu che  giustu, at a otènniri s'arrecumpentza  su giustu.</text:p>
      <text:p text:style-name="P315">10,42 E chini at donai mancai sceti una tassa de àcua frisca a unu de custus piticheddus, ca est discìpulu miu, in beridadi bosi naru: no at a pèrdiri s'arrecumpentza sua».</text:p>
      <text:p text:style-name="P316">11,1 Candu Gèsus iat acabau de donai custas istrutzionis a is doxi discìpulus suus, si ndi fiat andau de innia po imparai e predicai in is citadis insoru.
</text:p>
      <text:p text:style-name="P317">11,2 Candu Giuanni fiat in presoni iat ascurtau de is òperas de Cristu e iat mandau a is discìpulus suus a ddi preguntai:
</text:p>
      <text:p text:style-name="P318">11,3 «Ses tui su chi depit bènniri o ndi abetaus un’àteru?».
</text:p>
      <text:p text:style-name="P319">11,4 E Gesùs iat arrespustu: "Baxei a narai a Giuanni su chi seis ascurtendi e biendi:
</text:p>
      <text:p text:style-name="P320">11,5 Is tzurpus torrant a biri, is tzopus camminant, is lebbrosus funt sanaus, is surdus intendint, is mortus arresuscitant, a is pòburus ddus evangelizant,
</text:p>
      <text:p text:style-name="P321">11,6 e biadu su chi no s'at a scandalizai/at a imbrunchinai po mori mia».
</text:p>
      <text:p text:style-name="P322">11,7 E in s’interis chi fiant andendi·si·ndi, Gesùs si fiat postu a fueddai de Giuanni a sa genti: «Ita seis andaus a biri in su desertu? 7  Una canna scutulada de su bentu?</text:p>
      <text:p text:style-name="P323"><text:s/>E it'est duncas, chi seis andaus a biri?
  A un’òmini cun bestiris delicaus?  Is chi portant bestiris delicaus funt in is palàtzius de is reis! </text:p>
      <text:soft-page-break/>
      <text:p text:style-name="P324">E tandus, ita seis andaus a biri? . A unu profeta?  Ellus, prus de unu profeta bosi naru</text:p>
      <text:p text:style-name="P325">Est de issu chi ddoi est scritu:
Mira, seu mandendi su nùntziu miu innantis a tui,
issu t'at a aprontai su caminu.
</text:p>
      <text:p text:style-name="P326">In beridadi bosi naru; in mesu de is nàscius de fèmina no ddoi nd’at essiu prus mannu de Giuanni su Batista, epuru su prus piticu in su rennu de is celus est prus mannu de issu.</text:p>
      <text:p text:style-name="P327">De is diis de Giuanni su Batista fintzas a immoi, su rennu de is celus patit violèntzia e is trevessus si ndi faint meris.</text:p>
      <text:p text:style-name="P328">Ca sa Lei e totu is Profetas ant profetizau fintzas a Giuanni.
</text:p>
      <text:p text:style-name="P329">E si boleis cumprèndiri, issu est cudd’Elias chi depit bènniri. </text:p>
      <text:p text:style-name="P330">Chini portat origas po cumprèndiri, chi ascurtit.</text:p>
      <text:p text:style-name="P331">Ma a chini dd’apu a assimbillai custa generatzioni?  Issa assimbillat a cuddus pipieddus sètzius in is pratzas chi a boxis narant a is cumpàngius:</text:p>
      <text:p text:style-name="P332">"S’eus sonau su pipiolu e no eis baddau, eus cantau un’atìtidu e no eis prantu".</text:p>
      <text:p text:style-name="P333">Est bènniu Giuanni, chi no papàt e no bufàt, e ant narau: “Portat unu dimòniu”.</text:p>
      <text:p text:style-name="P334">Est bènniu su Fillu de s’òmini, chi papat e bufat, e narant: 
Ecu unu satzagoni e un’imbriagoni, amigu de is publicanus e de is pecadoris. 
: Ma a sa sabiduria dd’ant torrau giustìtzia is òperas suas”.1</text:p>
      <text:p text:style-name="P335">Insaras si fiat postu a certai is citadis me innui iat fatu su prus de is miràculus, poita ca no si fiant cunvertias:</text:p>
      <text:p text:style-name="P336">«Arguai a tui, Corazìn!  Arguai a tui, Betsàida.  Ca, si in Tiro e in Sidoni iant àiri fatu is miràculus chi ant fatu in mesu a bosàterus, giai de diora iant àiri fatu penitèntzia, a sacu e in su cinixu.</text:p>
      <text:p text:style-name="P337">Ma deu bosi naru: at a èssiri prus lèbia sa pena/sorti po Tiro e Sidoni, in sa dii de su giudìtziu, de sa de bosàterus.</text:p>
      <text:p text:style-name="P338">E a tui, Cafarnau, fintzas a celu ti nci ant a artziai?  Fintzas a s’Ades nci as a arrùiri!   Ca si in Sòdoma iant a èssiri fatu is miràculus fatus a tui, issa s’iat a agatai ancora.</text:p>
      <text:p text:style-name="P339">Ma deu bosi naru: in sa dii de su giudìtziu Sòdoma, sa pena sua, dd’at a aguantai prus de tui!».</text:p>
      <text:p text:style-name="P340">In cuddu tempus Gesùs arrespundendi naràt: «Ti torru gràtzias, o Babbu, Sennori de su celu e de sa terra, po no àiri cuau custas cosas a is sàbius e a is abistus e po ddas s’àiri contadas/scoviadas/ammostadas a is piticus.</text:p>
      <text:p text:style-name="P341"><text:s/>Eja/Sissi, o Babbu, ca aici t’est praxu.</text:p>
      <text:p text:style-name="P342">Totu m’at donau su Babbu miu, nemus connoscit a su Fillu mellus de su Babbu, e nemus connoscit a su Babbu mellus/foras de su Fillu e cuddu a chini su Fillu dd’iat a bòlliri scoviai.</text:p>
      <text:p text:style-name="P343">Benei a mei, bosàterus totus, chi seis fadiaus e carrigaus/oprimius/agravaus e deu bosi apu a donai arrecreu.
</text:p>
      <text:p text:style-name="P344">Atuai·si su giuali miu e imparai de mei, chi seu masedu e de coru ùmili, e eis a agatai arrecreu po is ànimas bostas.
</text:p>
      <text:p text:style-name="P345">Ca su giuali miu est bonu a dd’aguantai e su càrrigu est lèbiu».


</text:p>
      <text:p text:style-name="P346">In cuddu tempus Gesùs passàt peri is campus de trigu in dii de sàbudu, a is discìpulus suus ddis iat pigau fàmini e iant cumentzau a boddiri spiga e a si dda papai.
</text:p>
      <text:p text:style-name="P347">Is fariseus biendi custu, dd’iant narau: «Ecu a is discìpulus tuus fendi su chi no est lìcitu a fàiri in dii de sàbudu».
</text:p>
      <text:p text:style-name="P348">E issu iat narau: «No eis lìgiu su chi iat fatu Dàvidi candu dd’iat pigau fàmini impari a is cumpàngius suus?
</text:p>
      <text:soft-page-break/>
      <text:p text:style-name="P349">Cumenti fiat intrau a sa domu de Deus e s’iant papau is panis de s’oferta, chi no fiat permìtiu a ndi papai, ni a issu ni a is chi fiant cun issu, ma sceti a is sacerdotus?
</text:p>
      <text:p text:style-name="P350"> O no eis lìgiu in sa Lei ca in is diis de sàbudu is sacerdotus in su tèmpiu profanant su sàbudu e funt chene curpa?
</text:p>
      <text:p text:style-name="P351">Immoi bosi naru ca innoi nci at cosa/unu prus manna/u de su tèmpiu.
</text:p>
      <text:p text:style-name="P352">Si iais cumprèndiu/scìpiu ita bolit narai: «Misericòrdia deu bollu e no sacrifìciu, no iais cundennau a is chene curpa.
</text:p>
      <text:p text:style-name="P353">Poita ca su Fillu de s’omini est sennori de su sàbudu».
</text:p>
      <text:p text:style-name="P354">E mòviu de innia fiat intrau a sa sinagoga insoru.
</text:p>
      <text:p text:style-name="P355">E mi’, ddoi fiat un’òmini chi portat una manu cancarada, e issus dd’iant preguntau a Gesùs: «Fait a sanai in dii de sàbudu?».
 Dd’iant narau aici po ddi ghetai curpa.</text:p>
      <text:p text:style-name="P356">E issu ddis iat narau: «Chini de bosàterus tenendi una brebei sceti e custa nci dd’arruit a unu fossu in dii de sàbudu no dd’aciapat e ndi dda bògat a foras?
</text:p>
      <text:p text:style-name="P357">Immoi, cantu prus si bàlit un’òmini de una brebei!
 Po custu est lìcitu a fàiri òperas bonas/su beni fintzas in dii de sàbudu».</text:p>
      <text:p text:style-name="P358">E a s’òmini, dd’iat narau: «Stèndia sa manu».  E issu dd’iat stendiada e sa manu fiat torrada sana che a s’àtera.</text:p>
      <text:p text:style-name="P359">Ma is fariseus, essius a foras, si fiant si fiant cunsillaus contras a issu po si ndi ddu bogai de mesu/po ddu spèrdiri.
</text:p>
      <text:p text:style-name="P360"> E Gesùs, dd’iat scìpiu e si ndi fiat andau de innia.
 Medas dd'iant postu in fatu e issu iat sanau a totus, </text:p>
      <text:p text:style-name="P361">cumandendi·ddis a no ddu scoviai,
</text:p>
      <text:p text:style-name="P362"> e po chi si fessit cumpriu su chi iat narau su profeta Isaia:
</text:p>
      <text:p text:style-name="P363">Ecu a su serbidori miu chi apu scioberau;
su prus stimau
e in issu s’ànima mia si cumpraxit.
 Apu a pònniri su spìridu miu asuba sua 
e issu at a annuntziai sa giustìtzia a is natzionis.</text:p>
      <text:p text:style-name="P364">No at a certai, ni aboxinai, 
e nemus at a intèndiri in is pratzas sa boxi sua.</text:p>
      <text:p text:style-name="P365">Sa canna astulada no dd’at a truncai, 
ni nd’at a studai su losìngiu  fumiendi, 
fintzas a fàiri bìnciri sa giudìtzia;
</text:p>
      <text:p text:style-name="P366"> in su nòmini suu is natzionis ant a tènniri spera.
</text:p>
      <text:p text:style-name="P367">In cuddu tempus, nci dd’iant portau un’indimoniau, tzurpu e mudu, e issu dd’iat sanau e su mudu fueddàt e biiat.
</text:p>
      <text:p text:style-name="P368"> E totu sa genti fiat spantada e naràt: «Ellus no est issu su fillu de Dàvidi?».
</text:p>
      <text:p text:style-name="P369">Ma is fariseus, intendendi aici, iant narau: «Custu nci bogat is dimònius po contu/cun su poderi de Beelzebú, prìncipi de is dimònius».
</text:p>
      <text:p text:style-name="P370">Issu perou, connoscendi su chi pensànt, ddis iat narau: «Ònnia rennu partziu s’arruinat e peruna citadi o famìlia partzia podit aguantai.
</text:p>
      <text:p text:style-name="P371">Ma, si sàtana nci bogat a sàtana, issu no est a cuncordu cun issu etotu, cumenti, duncas, at a pòdiri aguantai su rennu suu?
</text:p>
      <text:p text:style-name="P372">E si deu nci bogu is dimònius in nòmini de Beelzebù, fillus bostus in nòmini de chini nci ddus bogant? 
 Po custu issus ant a èssiri is giudìcis de bosàterus. </text:p>
      <text:p text:style-name="P373">Si deu perou nci bogu is dimònius cun su Spíridu de Deus,  ca nc’est giai lompiu su rennu de Deus in mesu a bosàterus.
</text:p>
      <text:p text:style-name="P374">Cumenti unu nci iat a pòdiri intrai a sa domu de s’òmini forti a ndi ddi furai totu, si ainnantis no dd’acàpiat?  Sceti insaras dd’at a pòdiri sdorrobbai sa domu. </text:p>
      <text:p text:style-name="P375">Chini no est cun mei est contras a mei e chini no arregollit cun mei, sperdìtziat.
</text:p>
      <text:p text:style-name="P376">Po custu bosi naru: Cali si siat pecau o frastimu at a èssiri perdonau a is òminis, su frastimu contras a su Spìridu perou no at a èssiri perdonau.
</text:p>
      <text:soft-page-break/>
      <text:p text:style-name="P377">Chini at a chistionai mali de su Fillu de s’òmini at a èssiri perdonau, su frastimu contras a su Spìridu perou no dd’at a èssiri perdonau ni in custu sèculu ni in su sèculu benideru.
</text:p>
      <text:p text:style-name="P378">Si pigais una mata bona, su frutu suu puru at a èssiri bonu, si pigais una mata mala, su frutu suu puru at a èssiri malu: ca de su frutu si connoscit sa mata.
</text:p>
      <text:p text:style-name="P379"><text:s/>Arratza de pìberas, cumenti podeis narai cosas bonas, sendi malus? 
 Ca sa buca fueddat de su chi est prenu su coru. </text:p>
      <text:p text:style-name="P380">Sa personi bona de su tesoru bonu ndi bogat cosas bonas, e sa personi mala de su tesoru malu ndi bogat cosas malas.
</text:p>
      <text:p text:style-name="P381">Ma deu bosi naru ca de ònnia fueddu chene càbudu is òminis nd’ant a torrai contu in sa dii de su giudìtziu;
</text:p>
      <text:p text:style-name="P382">ca po is fueddus tuus as a èssiri  giustificau/decrarau giustu e po is fueddus tuus as a èssiri cundennau».
</text:p>
      <text:p text:style-name="P383">Insaras unus cantu scribas e fariseus dd’iant preguntau: «Maistu, boleus biri unu sinnu de tui/emus a bolliri biri unu sinnu». E issu ddis iat arrespustu:
 Ed egli rispose:</text:p>
      <text:p text:style-name="P384"> «Una generatzioni mala e adùltera est circhendi unu sinnu! 
 Perou no ddis at a èssiri donau perunu sinnu, si no su sinnu de Gionas, su profeta.</text:p>
      <text:p text:style-name="P385">Aici cumenti Gionas etotu fiat tres diis e tres notis in sa brenti de su pisci, aici su Fillu de s’òmini at a èssiri tres diis e tres notis in su coru de sa terra.
</text:p>
      <text:p text:style-name="P386">Is òminis de Nìnive si nd’ant a strantaxai in su giudìtziu cun custa generatzioni e dd’ant a cundennai, ca si fiant cunvertius a pustis de sa prèdica de Gionas.
  Alloddu innoi unu prus de Gionas! </text:p>
      <text:p text:style-name="P387">Sa reina de su Sud si nd’at a pesai in su giudìtziu cun custa generatzioni e dd’at a cundennai, ca issa ndi fiat arribbada de is trèminis de sa terra po ascurtai sa sabiduria de Salomoni; alloddu innoi unu prus de Salomoni!
</text:p>
      <text:p text:style-name="P388">Candu unu spìridu malu ndi essit de un’òmini, si nd’andat peri logus àrridus circhendi pàsiu, perou no nd’agatat.
</text:p>
      <text:p text:style-name="P389">Insaras narat: “Apu a furriai a domu mia, de innui ndi seu essiu”.   E furriau dd’agatat sbùida, mundada e assetiada.
</text:p>
      <text:p text:style-name="P390">Insaras andat, si pigat cun issu àterus seti spìridus prus malus de issu e intrant a ddoi bìviri; e sa cunditzioni noa de cuss’òmini si fait peus de sa de innantis.
  Aici at a èssiri po custa generatzioni mala puru». </text:p>
      <text:p text:style-name="P391"> In s’interis chi fiat ancora chistionendi a is trumas, sa mama e fradis suus, fiant in foras circhendi de chistionai cun issu.
</text:p>
      <text:p text:style-name="P392">E calincunu dd’iat narau: «Mi’ in foras a mama tua e a fradis tuus circhendi de ti chistionai».
</text:p>
      <text:p text:style-name="P393">E issu, arrespundendi a su chi fiat chistionendi, iat narau: «E chini est mama mia e chini funt fradis mius?».
</text:p>
      <text:p text:style-name="P394">E stendiendi sa manu conca a is discìpulus suus iat narau: «Ecu a mama mia e a fradis mius;
</text:p>
      <text:p text:style-name="P395">ca chini fait sa voluntadi de su Babbu miu chi est in is celus, issu m’est fradi, sorri e mama».
</text:p>
      <text:p text:style-name="P396">13,1 Sa dii Gesùs fiat essiu de domu e si fiat sètziu in s'oru de mari. </text:p>
      <text:p text:style-name="P397">13,2 E genti meda si ddoi fiat acostiada a fùrriu  tantis chi issu si nci fiat artziau a una barca a si sètziri, e totu sa genti fiat abarrada in sa plaja.</text:p>
      <text:p text:style-name="P398">13,3 Issu ddis iat fueddau de cosas medas cun paràbulas. E iat narau: «Mi’ su seminadori chi fiat essiu a seminai.
</text:p>
      <text:p text:style-name="P399">13,4 E in s'interis chi fiat seminendi parti de su sèmini nci fiat arruta a sa bia e fiant calaus is pillonis e si nci dd'iant papau.</text:p>
      <text:p text:style-name="P400">13,5 Un'àtera parti nci fiat arruta in logu perdosu, innui no ddoi iat terra meda;e luegus iat intzeurrau, ca sa terra fiat pagu funguda.
 </text:p>
      <text:soft-page-break/>
      <text:p text:style-name="P401">13,6 Ma, candu fiat essiu su soli, dd'iat abruxada ca no portendi arreìxini si fiat sicada.</text:p>
      <text:p text:style-name="P402">13,7 Un'àtera parti nci fiat arruta in mesu a sa spina e sa spina fiat crèscia e dd'iat allupada.</text:p>
      <text:p text:style-name="P403">13,8 Un'àtera nci fiat arruta in sa terra bona e iat bogau frutu, a logus a su centu, a logus a su sessanta, a logus a su trinta.</text:p>
      <text:p text:style-name="P404">13,9 Chini pòrtat origas intendat». </text:p>
      <text:p text:style-name="P405">13,10 E si ddi fiant acostiaus is discìpulus e dd'iant narau: «Poit'est chi ddis fueddas in paràbulas?».</text:p>
      <text:p text:style-name="P406">13,11 Issu iat arrespustu: «Poita ca a bosàterus bosi ant donau a connòsciri is mistèrius de su rennu de is celus, ma a issus no.
</text:p>
      <text:p text:style-name="P407">13,12 Ca a chini tenit dd'ant a donai e at a èssiri in abbundantza; e a chini no tenit ndi dd'ant a pigai fintzas su chi tenit.</text:p>
      <text:p text:style-name="P408">13,13 Po custu est chi ddis fueddu in paràbulas: ca mancai biendi no biint, e mancai intendendi no intendint e no comprendint.</text:p>
      <text:p text:style-name="P409">13,14 E aici si cumprit in /po issus sa profetzia de Isaia chi narat: Eis a ascurtai, ma no eis a cumprèndiri,
Eis a castiai, ma no eis a biri.
</text:p>
      <text:p text:style-name="P410">13,15 Ca su coru de custu pòpulu s'est intostau,
funt grais de origas,
e ant serrau is ogus,
po chi no biant cun is ogus, insoru
no intendant cun is origas insoru
no cumprendant cun su coru insoru
e no si cunvertant, e deu ddus sani/apu a sanai.</text:p>
      <text:p text:style-name="P411">13,16 Ma biaus is ogus bostus ca nci biint e is origas bostas ca nci intendint.</text:p>
      <text:p text:style-name="P412">13,17 In beridadi bosi naru: medas profetas e òminis giustus ant disigiau de biri su chi bieis bosàterus, e no dd'ant bistu, e de ascurtai su chi ascurtais bosàterus, e no dd'ant intèndiu!
</text:p>
      <text:p text:style-name="P413">13,18 Ascurtai, duncas, bosàterus sa paràbula de su seminadori:</text:p>
      <text:p text:style-name="P414">13,19 Ónnia borta chi unu ascurtat sa paràula de su rennu e no dda cumprendit, benit su malìnniu e ndi ddi furat su chi fiat seminau in su coru suu: custu est su sèmini seminau in sa bia.</text:p>
      <text:p text:style-name="P415">13,20 Su chi ant seminau in logu pedrosu est s'òmini chi ascurtat su paràula e in deretura dd’arricit cun gosu,</text:p>
      <text:p text:style-name="P416">13,21 ma no portat arreìxinis suas e no tenit firmesa, e aici cumenti ddoi arribbat una tribbulia o persecutzioni po mori de sa paràula, luegus si scandalizat/imbruchinat.</text:p>
      <text:p text:style-name="P417">13,22 Cuddu seminau in mesu a sa spina est su chi ascurtat sa paràula, ma is àxius de su mundu e s'ingannu de s'arrichesa allupant sa paràula e issa no bogat frutu.</text:p>
      <text:p text:style-name="P418">13,23 Cuddu seminau in sa terra bona est su chi ascurtat sa paràula e dda cumprendit; issu bogat frutu a chini su centu, a chini su sessanta, a chini su trinta in prus».</text:p>
      <text:p text:style-name="P419">13,24 Un'àtera paràbula si dd’iat presentada aici: «Su rennu de is celus assimbillat a un'òmini chi at seminau sèmini bonu in su cungiau suu.</text:p>
      <text:p text:style-name="P420">13,25 Ma candu fiant totus dromius fiat bènniu su nemigu, iat seminau lùlluru in mesu a su trigu e si ndi fiat andau.</text:p>
      <text:p text:style-name="P421">13,26 Candu su lori iat bogau frori e frutu, insaras fiat essiu su lùlluru puru.</text:p>
      <text:p text:style-name="P422">13,27 E is tzeracus fiant andaus a domu de su meri e ddi iant narau: «Su meri, no ias seminau sèmini bonu in su cungiau tuu?  E de innui nd’est essiu su lùlluru?».</text:p>
      <text:p text:style-name="P423">13,28 E issu ddis iat arrespustu: «Unu nemigu dd'at fatu custu». . E is tzeracus dd'iant narau: «Bolis chi andeus a ndi ddu bogai?»</text:p>
      <text:p text:style-name="P424">13,29 «Nossi», iat arrespustu, ca no siat chi/no siat mai, boghendide·ndi su lùlluru, ndi sdarreixineis su trigu puru.</text:p>
      <text:p text:style-name="P425">13,30 Lassai chi s'unu e s'àteru cresciant impari fintzas a su messòngiu/a ndi ddu messai e a s'ora de messai apu a narai a is messadoris: Arregolleide·ndi innantis su lùlluru e acapiaide·ddu a mànigas po dd'abbruxai: su trigu intamis pinnigainde·ddu a su stàulu miu».</text:p>
      <text:soft-page-break/>
      <text:p text:style-name="P426">13,31 Ddis iat presentau un'àtera paràbula: «Su rennu de is celus est che a unu granu de alaussa, chi un'òmini pigat e sèminat in su cungiau suu.</text:p>
      <text:p text:style-name="P427">13,32 Custu est su prus piticu de totu is sèminis ma candu est crèsciu fait prus mannu de is àterus legùminis e fait a mata, tantis chi ddoi acudint is pillonis de su celu e si faint su niu in is cambus suus».</text:p>
      <text:p text:style-name="P428">13,33 Ddis iat narau un'atera paràbula: «Su rennu de is celus est che a su fromentu, chi una fèmina at pigau e ciuetu cun tres mois de farra fintzas a candu est pesau totu».
</text:p>
      <text:p text:style-name="P429">13,34 Totu custas cosas Gesus ddas iat naradas a sa genti in paràbulas e (a issus) ddis fueddàt a paràbulas sceti,</text:p>
      <text:p text:style-name="P430">13,35 po chi s'essit cumpriu su chi iat narau su profeta:
Apu a abèrriri sa buca mia in paràbulas,
apu a decrarai/narai cosas cuadas (fintzas) de candu est nàsciu su mundu.
</text:p>
      <text:p text:style-name="P431">13,36 A pustis Gesùs iat lassau sa genti e fiat intrau a domu; is discìpulus si ddi fiant acostiaus po ddi narai: «Spiega·sì in craru sa paràbula de su lùlluru in su cungiau».</text:p>
      <text:p text:style-name="P432">13,37 E issu iat arrespustu: «Su chi sèminat sèmini bonu est su Fillu de s'òmini.</text:p>
      <text:p text:style-name="P433">13,38 Su cungiau est su mundu. Su sèmini bonu funt is fillus de su rennu, su lùlluru funt is fillus de su malìnniu,</text:p>
      <text:p text:style-name="P434">13,39 e su nemigu chi dd'at seminada est su tiàulu.  Su messòngiu est s'acabbu de su mundu, e is messadoris funt is àngiulus. </text:p>
      <text:p text:style-name="P435">13,40 Cumenti si nd'arregollit su lùlluru e s'abruxat in su fogu, aici etotu at a èssiri a s'acabbu de su mundu.</text:p>
      <text:p text:style-name="P436">13,41 Su fillu de s'òmini at a mandai a is àngiulus suus, chi nd'ant bogai de su rennu suu totu is scàndulus e totu cuddus chim pràticant su mali,</text:p>
      <text:p text:style-name="P437">13,42 e nci ddus ant a ghetai a su forraxi allutu innui at a èssiri prantu e tzichirriu de dentis.
</text:p>
      <text:p text:style-name="P438">13,43 Insaras is giustus ant a lùxiri che a su soli in su rennu de Babbu insoru. 
 Chini portat origas chi intendat/ascurtit. </text:p>
      <text:p text:style-name="P439">13,44 Su rennu de is celus est che a unu scussórgiu cuau in unu cungiau; dd'agatat un'òmini e ddu torrat a cuai, a pustis andat, totu prexau, si bendit totu  e si comporat cuddu cungiau.
</text:p>
      <text:p text:style-name="P440">13,45 Su rennu de is celus est che a unu bendidori chi andat in circa de perlas pretziadas; </text:p>
      <text:p text:style-name="P441">13,46 cumenti agatat una perla chi balit meda, andat, si bendit totu su chi tenit e si dda comporat.</text:p>
      <text:p text:style-name="P442">13,47 Su rennu de is celus est fintzas che a un'arretza ghetada a mari, chi ndi piscat ònnia arratza de pisci.
</text:p>
      <text:p text:style-name="P443">13,48 Candu est prena, is piscadoris ndi dda tirant a terra e a pustis, si setzint, e nci ponint su pisci bonu in is canisteddus e su malu nci ddu fuliant.</text:p>
      <text:p text:style-name="P444">13,49 Aici at a èssiri a s'acabbu de su mundu.  Ant a bènniri is àngiulus e nd'ant a sceddai is malus de is bonus</text:p>
      <text:p text:style-name="P445">[13,42 e nci ddus ant a ghetai a su forraxi allutu innui at a èssiri prantu e tzichirriu de dentis.
</text:p>
      <text:p text:style-name="P446">13,51 «Cumprèndiu totu eis?».   Dd'iant arrespustu: «Eja».</text:p>
      <text:p text:style-name="P447">13,52 E issu ddis iat narau: «Po custu ònnia scriba chi s'est fatu discìpulu de su rennu de is celus est che a unu meri de domu chi ndi bogat de su siddau suu cosas noas e bècias».
</text:p>
      <text:p text:style-name="P448">13,53 Acabbadas custas paràbulas, Gesùs fiat mòviu de innia</text:p>
      <text:p text:style-name="P449">13,54 e torrau a sa pàtria sua donàt imparus in sa sinagoga insoru e sa genti abarràt spantada e naràt: «Ellus de innui ddi benit a custu totu custa sabidoria e custus miràculus?</text:p>
      <text:p text:style-name="P450">13,55 Ma no est su fillu de su maistu de linna? 
 A sa mama no ddi narant Maria e a is fradis Giacu, Giusepi, Simoni e Giudas? </text:p>
      <text:p text:style-name="P451">13,56 E is sorris no funt totus cun nosu innoi? 
 De innui ddi benint tandu totu custas cosas»?</text:p>
      <text:soft-page-break/>
      <text:p text:style-name="P452">13,57 E issus si ndi scandalizànt de issu. 
 Ma Gesùs ddis iat narau: «Unu profeta no est minispretziau si no in sa pàtria sua e in domu sua».</text:p>
      <text:p text:style-name="P453">13,58 E no iat fatu miràculus meda po mori ca no creiant.</text:p>
      <text:p text:style-name="P454">14,1 In cuddu tempus a Erodi su tetrarca ddi fiat arribada sa boxi de sa fama de Gesùs.
</text:p>
      <text:p text:style-name="P455">14,2 Issu ddis iat narau a is serbidoris suus: «Custu est Giuanni su Batista arresuscitau de is mortus; po cussu si faint miràculus po mesu de issu/sa potèntzia de is miràculus òperat in issu».
</text:p>
      <text:p text:style-name="P456">14,3 Erodi iat tentu a Giuanni, postu in cadenas e ghetau a presoni po mori de Erodìadi, sa mulleri de Filipu, su fradi.</text:p>
      <text:p text:style-name="P457">14,4 Giuanni difatis ddi iat narau: «No t'est lìcitu a dda tènniri!».</text:p>
      <text:p text:style-name="P458">14,5 Mancai Erodi boliat a ddu bociri, timiat a su pòpulu ca ddu cunsideràt unu profeta.</text:p>
      <text:p text:style-name="P459">14,6 Sa dii chi Erodi cumpriat is annus, sa filla de Erodìadi iat baddau ananti a totus e a Erodi ddi fiat agradèssia aici meda</text:p>
      <text:p text:style-name="P460">14,7 chi ddi iat impromìtiu giurendi, ca ddi iat àiri donau totu su chi issa ddi iat àiri pediu.</text:p>
      <text:p text:style-name="P461">4,8 E issa, intzullada de sa mama, iat narau: «Aporri·mì innoi, in una safata, sa conca de Giuanni su Batista».</text:p>
      <text:p text:style-name="P462">14,9 E su rei si ndi fiat dispraxu, ma po arrespetu de sa giura fata e po is cumbidaus iat cumandau a si dda donai </text:p>
      <text:p text:style-name="P463">14,10 e iat mandau a ndi segai sa conca a Giuanni in presoni. </text:p>
      <text:p text:style-name="P464">4,11 Sa conca sua nci dd’iant portada in una safata e dd'iant donada a sa picioca, e issa dd'iat donada a sa mama.</text:p>
      <text:p text:style-name="P465">14,12 Is discìpulus suus fiant andaus a ndi pigai su corpus, dd'iant interrau e fiant andaus a donai sa nova a Gesùs.</text:p>
      <text:p text:style-name="P466">14,13 Intendendi aici, Gesùs fiat mòviu de innia, po contu suu, in una barca e si fiat arretirau a unu logu desertu.  Ma sa genti, dd'iat scìpiu, e de is citadis ddi iant postu in fatu a pei. </text:p>
      <text:p text:style-name="P467">14,14 Issu, candu ndi fiat calau de sa barca, iat bistu a un’arei manna de genti, ndi ddi fiat partu mali de issus e iat sanau a is malàidus insoru.</text:p>
      <text:p text:style-name="P468">14,15 A scurigadroxu, si ddi fiant acostiaus is discìpulus e ddi iant narau: «Su logu est desertu e est giai trigadiu; dispidi·nci sa genti po chi andit a is biddas a si comporai cosa de papai».
</text:p>
      <text:p text:style-name="P469">14,16 Ma Gesùs iat arrespustu: «No nci at abbisòngiu chi andint; donaide·ddis bosàterus etotu a papai».</text:p>
      <text:p text:style-name="P470">14,17 Ddi iant narau: «Innoi portaus sceti cincu panis e duus piscis!».</text:p>
      <text:p text:style-name="P471">14,18 E issu iat narau: «Betei·mi·nde·ddus a innoi».</text:p>
      <text:p text:style-name="P472"><text:s/>14,19 E a pustis chi iat cumandau a sa genti a si sètziri asuba de s'erba, iat pigau is cincu panis e is duus piscis, iat castiau a celu, iat beneixu, iat segau is panis e ddus iat donaus a is discìpulus e is discìpulus ddus iant aportus a sa genti.
</text:p>
      <text:p text:style-name="P473">14,20 Totus iant papau e si fiant pràndius beni; e si nd'iant leau doxi cofas prenas de su pani chi ddoi iat sobrau.
</text:p>
      <text:p text:style-name="P474">14,21 Is chi iant papau fiant unus cincu milla òminis, chene pònniri in contu is fèminas e is pipius.
</text:p>
      <text:p text:style-name="P475">14,22 Luegus a pustis ddis iat ordinau a is discìpulus a nci artziai a sa barca e a andai innantis suu a s'àtera ala, in s'interis chi issu nci fiat dispidendi a sa genti.</text:p>
      <text:p text:style-name="P476">14,23 Dispidia sa genti, fiat artziau a su monti, a solu, a pregai.  . A mericeddu a tradu, fiat ancora innia a solu</text:p>
      <text:p text:style-name="P477">14,24 Sa barca in s'ora fiat giai in mari biu/nci fiat giai atesu mìllias meda de terra e dda fiant trumbullendi is undas, ca fiat tirendi bentu contra.</text:p>
      <text:p text:style-name="P478">14,25 Faci a càbudu de noti issu fiat mòviu conca anca fiant issus caminendi a pilu de àcua.</text:p>
      <text:soft-page-break/>
      <text:p text:style-name="P479">14,26 Is discìpulus, biendide·ddu caminendi a pitzus de s'àcua, si ndi fiant assicaus e iant narau: «Est una pantàsima» e iant atacau a aboxinai po sa timoria.</text:p>
      <text:p text:style-name="P480">14,27 Ma in deretura Gesùs ddis iat narau: «Coràgiu ca seu deu, no timais.
</text:p>
      <text:p text:style-name="P481">14,28 Pedru ddi iat narau: «Sennori, si ses tui, cumanda·mì a bènniri aundi ses tui asuba de s'àcua».
</text:p>
      <text:p text:style-name="P482">14,29 E issu iat narau: «Beni!».  Perdu, calendide·ndi de sa barca, si fiat postu a caminai asuba de s'àcua e fiat mòviu faci a Gesùs.</text:p>
      <text:p text:style-name="P483">14,30 Ma biendi su bentu forti, iat tìmiu e, cumentzendi a nci afundai, iat aboxinau: «Sennori, sarva·mì».</text:p>
      <text:p text:style-name="P484">14,31 E luegus Gesùs ddi iat stendiau sa manu, dd'iat agafau e ddi iat narau: «Òmini cun pagu fidi, e poita est chi as dudau?».</text:p>
      <text:p text:style-name="P485">14,32 Cumenti nci fiant artziaus a sa barca, su bentu iat sentzau.</text:p>
      <text:p text:style-name="P486">14,33 Is chi fiant in sa barca si ddi fiant ingenugaus ananti, narendi: «Tu ses diaderus su Fillu de Deus!».</text:p>
      <text:p text:style-name="P487">14,34 Truessau chi iant su mari, fiant arribbaus a sa terra de Genèsaret.</text:p>
      <text:p text:style-name="P488">14,35 E sa genti de su logu, connotu chi iant a Gesùs, iant spartzinau sa nova in totu sa regioni; nci ddi iant portau totu is malàidus,</text:p>
      <text:p text:style-name="P489">14,36 e ddu pregànt de ddi pòdiri tocai a su mancu s'oru de su manteddu.
  E totu is chi ddu tocànt fiant sanaus.</text:p>
      <text:p text:style-name="P490">15,1 In cussu tempus de Gerusalemmi fiant arribbaus a innui fiat Gesùs uns cantu fariseus e unus cantu scribas e ddi iant narau:

</text:p>
      <text:p text:style-name="P491">15,2 . 15,2 «Poita is discìpulus tuus no ponint in menti a su connotu de is antigus? Ca no si sciàcuant is manus candu papant!».</text:p>
      <text:p text:style-name="P492">15,3 E issu ddis iat arrespustu: «Poit'est chi bosàterus no poneis in menti a su cumandamentu de Deus in nòmini de su connotu bostu?</text:p>
      <text:p text:style-name="P493">15,4 Deus at narau: “Onora a su babbu e a sa mama e in prus: A chini maleixit a su babbu e sa mama ddu cundennint a morti”.</text:p>
      <text:p text:style-name="P494">15,5 Intamis bosàterus  narais: “Chini ddi narat a su babbu o a sa mama: Cali siat agiudu chi depias arriciri de mei est ofertu a Deus,</text:p>
      <text:p text:style-name="P495">15,6 no est prus in òbbrigu de onorai a su babbu o a sa mama”.  Aici eis torrau a nudda sa paràula de Deus in nòmini de sa su connotu bostu.</text:p>
      <text:p text:style-name="P496">15,7 Ipòcritas! Isaia profetizeit beni de bosàtèrus, candu narendi:</text:p>
      <text:p text:style-name="P497">15,8 Custu pòpulu m'onorat a fueddus, 
ma su coru suu est atesu de mei.
</text:p>
      <text:p text:style-name="P498">15,9 Issus m’adorant de badas, imparendi dotrinas chi funt pretzetus de òminis».</text:p>
      <text:p text:style-name="P499">15,10 A pustis, iat assoddiu sa genti e iat narau: «Ascurtai e cumprendei!</text:p>
      <text:p text:style-name="P500">15,11 No est su chi intrat a buca chi imbrutat s'òmini, ma est su chi ndi essit de sa buca chi imbrutat s'òmini!».
</text:p>
      <text:p text:style-name="P501">15,12 E is discìpulus si ddi fiant acostiaus po ddi narai: «Ddu sciis ca is fariseus si funt scandalizaus/ofèndius intendendi custas paràulas?».
</text:p>
      <text:p text:style-name="P502">15,13 E issu iat arrespustu: «Ónnia fundu chi no at prantau Babbu miu de is celus ndi dd’ant a bogai de fundu.</text:p>
      <text:p text:style-name="P503">15,14 Lassaide·ddus stai! . Funt tzurpus e ghias de tzurpus.  E candu unu tzurpu ghiat a un'àteru tzurpu, ambuduus nci ant a arrùiri a unu fossu!»</text:p>
      <text:p text:style-name="P504">15,15 Pedru tandu ddi iat narau: «Acrara·sì custa paràbula».</text:p>
      <text:p text:style-name="P505">15,16 E issu iat arrespustu: «Bosàterus puru ancora chene intelletu seis?</text:p>
      <text:p text:style-name="P506">15,17 No ddu cumprendeis ca totu su chi intrat a buca, passat in sa brenti e nc'acabbat in sa latrina/mara?</text:p>
      <text:soft-page-break/>
      <text:p text:style-name="P507">15,18 Intamis su chi ndi essit de buca benit de su coru.  Custu est chi imbrutat s'òmini.</text:p>
      <text:p text:style-name="P508">15,19 Ca est de su coru chi ndi essint is ideas malas, is mortis, is adultèrius, is lussùrias/fornicatzionis is furas, is testimonias frassas, is frastimus.
</text:p>
      <text:p text:style-name="P509">15,20 Custas funt is cosas chi imbrutant s'òmini, ma su de  papai chene si sciacuai is manus no ddu imbrutat».</text:p>
      <text:p text:style-name="P510">5,21 Mòviu de innia, Gesùs iat tirau faci a is partis de Tiru e Sidoni.
</text:p>
      <text:p text:style-name="P511">15,22 E ecu a una fèmina Cananea, chi fiat arribbendi de cussus tretus, si fiat posta a aboxinai: «Teni piedadi de mei, Sennori, fillu de Dàvidi. A filla mia dd’est trumentendi de mala manera unu dimòniu». A filla mia est trumentendide·dda de mala manera unu dimòniu».</text:p>
      <text:p text:style-name="P512">15,23 Ma issu no dd'iat torrau mancu mancu fueddu.  Tandu is discìpulus si ddi fiant acostiaus preghendide·ddu: «Stesia·nce·dda, ca dda portaus  in fatu a boxis».</text:p>
      <text:p text:style-name="P513">15,24 E issu iat arrespustu: «No m'ant mandau po àteru si no po is brebeis chi si funt pèrdias de sa domu de Israeli».</text:p>
      <text:p text:style-name="P514">15,25 Ma issa si fiat acostiada e si fiat ghetada a terra ananti suu narendi: «Sennori, agiuda·mì!».</text:p>
      <text:p text:style-name="P515">15,26 E issu iat arrespustu: «No andat beni a ndi pigai su pani de is fillus e a nci ddu ghetai a is calleddus».</text:p>
      <text:p text:style-name="P516">15,27 «Est berus, Sennori» iat narau sa fèmina, «fintzas is calleddus si papant sa pitzialla chi nci arruit a terra de sa mesa de is meris».</text:p>
      <text:p text:style-name="P517">15,28 Insaras Gesùs ddi iat arrespustu: «Fèmina, ita manna chi est sa fidi tua!  E in deretura sa filla fiat sanada. Aici siat cumenti disìgias».  E in deretura sa filla fiat sanada.</text:p>
      <text:p text:style-name="P518">15,29 A pustis chi si nci fiat stesiau de innia, Gesùs fiat arribbau a su mari de Galilea, nci fiat artziau a monti e si fiat sètziu inguni.</text:p>
      <text:p text:style-name="P519">15,30 A ingìriu suu fiat acudia un'arei mannu de genti cun in fatu tzopus, strupiaus, tzurpus, surdus e medas àterus malàidus; si ddus iant postus ananti, in peis suus, e issu ddus iat sanaus.</text:p>
      <text:p text:style-name="P520">15,31 E sa genti fiat spantada biendi is mudus fueddendi, is strupiaus torraus sanus, is tzopus caminendi e is tzurpus torrendi a biri.  E  torrànt glòria a su Deus de Israeli.</text:p>
      <text:p text:style-name="P521">15,32 E Gesùs iat tzerriau a is discìpulus e iat narau: «Mi ndi parit làstima de custa genti: funt giai tres diis in fatu miu e no portant cosa de papai. No bollu chi si nd’andint giaunus, no siat chi si nci furrint in sa bia». No bollu chi si ndi andint giaunus, no siat chi si nci furrint in sa bia».</text:p>
      <text:p text:style-name="P522">15,33 E is discìpulus ddi iant narau: «E innui agataus in su desertu bastanti pani po ndi bogai su fàmini a un'arei de genti aici manna?».</text:p>
      <text:p text:style-name="P523">15,34 Ma Gesùs iat preguntau: «Cantus panis portais?».  Iant arrespustu: «Seti, e pagus piscixeddus».</text:p>
      <text:p text:style-name="P524">15,35 A pustis de àiri cumandau a sa genti a si sètziri in terra,</text:p>
      <text:p text:style-name="P525">15,36 Gesùs iat pigau is seti panis e is piscis, iat torrau gràtzias, ddus iat segaus, ddus iat donaus a is discìpulus e issus ddus iant aportus a sa genti.</text:p>
      <text:p text:style-name="P526">15,37 Totus iant papau e si ndi fiant pràndius.  De is tancus chi ddoi iat abarrau nd’iant pigau seti cofas prenas.</text:p>
      <text:p text:style-name="P527">15,38 Is chi iant papau fiant cuatrumilla òminis, chene pònniri in contu is fèminas e piciocheddus.</text:p>
      <text:p text:style-name="P528">15,39 Dispidiu chi nci iat sa genti, Gesùs nci fiat artziau a sa barca e fiat andau a is partis de Magadàn.</text:p>
      <text:p text:style-name="P529">16,1 Is fariseus e is sadduceus si fiant acostiaus po ddu pònniri a prova e dd’iant pediu a ddis ammostai  unu sinnu de su celu.</text:p>
      <text:p text:style-name="P530"><text:s/>16,2 Ma issu iat arrespustu: «Candu est scurighendi, bosàterus narais: “Tempus bonu”, ca su celu est arrùbiu che fogu; </text:p>
      <text:p text:style-name="P531">16,3 e a mengianu: “Oi tempus malu, ca su celu est arrùbiu  cotu”.   Scieis cumprèndiri cumenti càmbiat su celu e no ndi scieis scerai is sinnus de is tempus?</text:p>
      <text:p text:style-name="P532">16,4 Una generatzioni pecadora e adùltera circat unu sinnu, ma no dd’at a èssiri donau perunu sinnu si no su sinnu de Gionas».  E lassendide·ddus, si ndi fiat andau.</text:p>
      <text:soft-page-break/>
      <text:p text:style-name="P533">16,5 Cumenti fiant passendi a s’àteru oru, a is discìpulus ddis iat scarèsciu  a ndi pigai su pani. 
</text:p>
      <text:p text:style-name="P534">16,6 Gesùs ddis iat narau: «Donai atentzioni e castiai·sì de su fromentu de is fariseus e de is sadduceus».
</text:p>
      <text:p text:style-name="P535">16,7 Ma issus arrexonendi impari narendi: «No eus ingortu  pani!».</text:p>
      <text:p text:style-name="P536">16,8 Comenti si ndi fiat sapiu Gesùs iat preguntau: «Òminis de pagu fidi, ita seis narendi ca seis chene pani? </text:p>
      <text:p text:style-name="P537">16,9 Ancora a cumprèndiri seis e no si nd’arregordais de is cincu panis po is cincumilla e cantus cadinus nd’eis pigau?</text:p>
      <text:p text:style-name="P538">16,10 E nemancu is seti panis po is cuatrumilla e cantu crobis nd’eis pigau?</text:p>
      <text:p text:style-name="P539">16,11 Cumenti est chi ancora no cumprendeis ca no est de su pani chi fia chistionendi candu bos’apu narau: Castiai·sì de su fromentu de is fariseus e de is sadduceus?».</text:p>
      <text:p text:style-name="P540">16,12 Insaras issus iant cumprèndiu ca issu no ddis iat narau a si castiai de su fromentu po su pani ma de sa dotrina de is fariseus e de is sadduceus.</text:p>
      <text:p text:style-name="P541">16,13 E lòmpiu chi fiat Gesùs a is partis de Cesarea de Filipu, ddis iat preguntau a is discìpulus suus: «Sa genti, e chini narat ca est su Fillu de s’òmini?».</text:p>
      <text:p text:style-name="P542">16,14 Iant arrespustu: «A chini Giuanni su Batista, a chini Elias, àterus Geremia o calincunu àteru de is profetas».
</text:p>
      <text:p text:style-name="P543">16,15 E ddis iat preguntau: «E bosàterus chini narais ca seu deu?».</text:p>
      <text:p text:style-name="P544">16,16 Iat arrespustu Simoni Pedru: «Tui ses su Cristu, su Fillu de su Deus biu».</text:p>
      <text:p text:style-name="P545">16,17 E Gesùs dd’iat narau: «Beneitu ses tui, Simoni fillu de Gionas, ca ni carri ni sànguni ti dd’ant scoviau, ma Babbu miu su chi est in is celus. </text:p>
      <text:p text:style-name="P546">16,18 E deu ti naru: Tui ses Pedru e asuba de custa pedra apu a fabricai sa crèsia mia e is gennas de s’Ades no dd’ant a binciri.</text:p>
      <text:p text:style-name="P547">16,19 A tui apu a donai is crais de su rennu de is celus, e totu su chi as a acapiai in sa terra at a èssiri acapiau in is celus, e totu su chi as a scapiai in sa terra at a èssiri scapu in is celus».
</text:p>
      <text:p text:style-name="P548">16,20 E tandu iat cumandau a is discipulus a no narai a nemus ca issu fiat su Cristu.
</text:p>
      <text:p text:style-name="P549">16,21 De insaras Gesùs iat incumentzau a narai a craru a is discìpulus suus ca depiat andai a Gerusalemmi e patiri meda a càusa de is mannus, de is sacerdotus majoris e de is scribas, ca ddu depiant bociri e ca depiat arresuscitai a sa de tres diis.</text:p>
      <text:p text:style-name="P550">16,22 Ma Pedru, si dd’iat pigau a una parti e si fiat postu a ddu certai narendi: «Deus ti ndi scampit, Sennori; custu a tui no t’at a incapitai mai». 
</text:p>
      <text:p text:style-name="P551">16,23 Ma issu, furriendi·si, iat narau a Pedru:«A illargu de mei, sàtana!  Tui mi ses de scàndulu, ca no pensas a is cosas chi funt de Deus, ma a is cosas chi funt de is òminis!».</text:p>
      <text:p text:style-name="P552">16,24 E Gesùs iat narau a is discìpulus suus: «Si calincunu bolit bènniri cun mei chi denneghit a sei etotu, s’atuit sa gruxi sua e mi sigat. 
</text:p>
      <text:p text:style-name="P553">16,25 Ca chini at a bòlliri sarvai sa vida sua, dd’at a pèrdiri; ma chini at a pèrdiri sa vida sua po mori mia, dd’at a agatai.
</text:p>
      <text:p text:style-name="P554">16,26 Cali profetu nd'at a tènniri s’omini a balangiai su mundu intreu, chi a pustis at a pèrdiri sa vida sua? 
  O ita iat a donai un’òmini a cuncàmbiu de sa vida sua?</text:p>
      <text:p text:style-name="P555">16,27 Ca su Fillu de s’òmini at a bènniri in sa gloria de Babbu suu, cun is àngiulus suus, e at torrai a onniunu cunforma a is òperas suas.</text:p>
      <text:p text:style-name="P556">16,28 In beridadi bosi naru: de is chi funt innoi, nci nd’at unus cantu chi no s’ant a mòrriri innantis de biri su Fillu de s’òmini benendi a su rennu suu».
</text:p>
      <text:p text:style-name="P557">17,1 Ses diis a pustis, Gesùs s’iat pigau infatu a Pedru, a Giacu e a Giuanni su fradi e nci ddus iat portaus a una parti, asuba de unu monti artu.</text:p>
      <text:p text:style-name="P558">17,2 E si fiat trasfigurau ananti insoru; sa cara sua luxendi che soli e is bestiris suu fendi·sì ìnnidus che sa luxi.</text:p>
      <text:soft-page-break/>
      <text:p text:style-name="P559">17,3 E totuinduna ddis aparèssint Mosès e Elias, chistionendi cun Gesùs.</text:p>
      <text:p text:style-name="P560">17,4 Tandu pigat su fueddu Pedru e narat a Gesùs: «Sennori, est cosa bona po nosu a abarrai innoi; si bolis, apu a fàiri innoi etotu tres barracas, una po tui, una po Mosès e una po Elias».</text:p>
      <text:p text:style-name="P561">17,5 Issu fiat ancora chistionendi candu una nui luxenti nci ddus imboddiàt in s’umbra sua. 
 E de innia una boxi chi naràt:
«Custu est su Fillu miu prus stimau, in issu mi seu cumpraxu.  Ascurtaide·ddu».</text:p>
      <text:p text:style-name="P562">17,6 Intende·ndi aici, is discìpulus si nci fiant ghetaus faci a terra e ddis iat pigau una timoria manna.</text:p>
      <text:p text:style-name="P563">17,7 Ma Gesùs si ddis fiat acostiau e tochendide·ddus iat narau: «Pesai·si·ndi e no timais».</text:p>
      <text:p text:style-name="P564">17,8 E artziendi is ogus no iant bistu prus a nemus, si no a Gesùs sceti.</text:p>
      <text:p text:style-name="P565">17,9 In s’interis chi ndi calànt de su monti, Gesùs ddis iat cumandau: «No ndi fueddeis cun nisciunus de custa bisioni fintzas a candu su Fillu de s’òmini no siat arresuscitau de is mortus».</text:p>
      <text:p text:style-name="P566">17,10 E is discìpulus dd’iant preguntau: «Poita est chi is scribas narant ca innantis depit bènniri Elias?».</text:p>
      <text:p text:style-name="P567"><text:s/>17,11 E issu iat arrespustu: «Eja, at a bènniri Elias e at torrai a asseliai ònnia cosa.</text:p>
      <text:p text:style-name="P568">17,12 Ma deu bosi naru: Elias est giai bènniu e no dd’ant connotu; antzis ant fatu de issu su chi ant bòfiu.  Aici etotu a su Fillu de s’òmini puru ddi tocat a pàtiri po manu insoru».</text:p>
      <text:p text:style-name="P569">17,13 Insaras is discìpulus iant cumprèndiu ca fiat fueddendi de Giuanni su Batista.</text:p>
      <text:p text:style-name="P570">17,14 E cumenti fiant torraus a innui fiat sa genti, un’òmini si  fiat acostiau a Gesùs, </text:p>
      <text:p text:style-name="P571"> 17,15 si fiat ingenugau ananti suu e dd’iat narau: «Sennori, teni·ndi làstima de fillu miu 
 ca tenit su mali caducu e est sunfrendi meda; medas bortas nci arruit a su fogu e medas bortas fintzas a s’àcua;</text:p>
      <text:p text:style-name="P572">17,16 nci dd’apu giai portau a is discìpulus tuus, e no dd’ant pòtziu sanai».</text:p>
      <text:p text:style-name="P573">17,17 E Gesùs iat arrespustu: «O generatzioni chene fidi e trevessa.  Fintzas a candu apu a èssiri cun bosàterus?  Fintzas a candu bos’apu a baliai?  Betei·mi·nde·ddu a innoi».</text:p>
      <text:p text:style-name="P574">17,18 Gesùs dd’iat certau e su dimòniu ndi fiat èssiu de issu e de insaras su piciocheddu fiat sanau.</text:p>
      <text:p text:style-name="P575">17,19 Intzandus is discìpulus, acostiendi·sì a Gesùs a una parti, dd’iant preguntau: «Poita est chi nosu no nci dd’eus potziu bogai?».</text:p>
      <text:p text:style-name="P576">17,20 E issu iat arrespustu: «Po sa pagu fidi de bosàterus.  In beridadi bosi naru: si eis a tènniri sa matessi fidi de unu granu de alàussa eis a pòdiri narai a custu monti: trantzi·tì de innoi a inguddei, e issu s’at a trantziri; nudda bos’at a èssiri impossìbili.</text:p>
      <text:p text:style-name="P577">17,21 [Custa arratza de dimònius si nci bogat sceti preghendi e giaunendi].</text:p>
      <text:p text:style-name="P578">17,22 In s’interis chi fiant impari in Galilea, Gesùs ddis iat narau: «A su Fillu de s’òmini funt po ddu intregai in is manus a is òminis</text:p>
      <text:p text:style-name="P579">17,23 e dd’ant a bociri, ma a sa de tres diis at a arresuscitai».  E issus si fiant intristaus meda.</text:p>
      <text:p text:style-name="P580">17,24 Arribaus a Cafarnau, si fiant acostiaus a Pedru is chi ndi boddiant su tributu de su tèmpiu/is duas dracmas e dd’iant narau: «Ellus su maistu de bosàterus is duas dracmas po su tèmpiu no ddas pagat?».</text:p>
      <text:p text:style-name="P581">17,25 Iat arrespustu: «Eja». Cumenti fiat intrendide·nci a domu, Gesùs ddu iat antitzipau narendi: «E ita ti parit o Simoni?  Is reis de custa terra de chini est chi ndi boddint is tributus e su censu? De is fillus insoru o de is stràngius?».</text:p>
      <text:p text:style-name="P582">17,26 Iat arrespustu: «De is stràngius».  E Gesùs: «Tandu is fillus funt lìbberus.</text:p>
      <text:p text:style-name="P583">17,27 Ma po no ddus scandalizai, bai a mari, gheta·nci su gamu e su primu pisci chi anniscat, piga·ddu e aberri·ddi sa buca, ddoi as a agatai unu soddu /unu stateri/staderi. Piga·nde·ddu e dona·ddu a issus de parti mia e tua/po mei e po tui».</text:p>
      <text:p text:style-name="P584">18,1 E in s'ora s'acostiànt a Gesùs is discìpulus narendi: «Chini est duncas su prus mannu in su rennu de is celus?».</text:p>
      <text:soft-page-break/>
      <text:p text:style-name="P585">18,2 Insaras Gesùs iat tzerriau a innui fiat issu a unu pipieddu, dd'iat postu in mesu insoru e iat narau:
</text:p>
      <text:p text:style-name="P586">18,3 «In beridadi bosi naru: si no s'eis a cunvertiri e no eis a èssiri che a pipieddus, no ddoi eis a intrai a su rennu de is celus.
</text:p>
      <text:p text:style-name="P587">18,4 Po custu chini s'at a torrai piticu cumenti a custu pipieddu, at a èssiri su prus mannu in su rennu de is celus.
</text:p>
      <text:p text:style-name="P588">18,5 E chini at a arriciri a unu pipiu cumenti a custu, in nòmini miu, arricit a mei etotu.
</text:p>
      <text:p text:style-name="P589">18,6 Chini intamis scandalizat (sceti) a unu de custus piticheddus chi creint in mei, est mellus po issu chi dd'apichint a tzugu una pedra de molenti, e chi nci ddu ghetint in mesu de mari.
</text:p>
      <text:p text:style-name="P590">18,7 Arguai a su mundu po is scàndulus!  Is scàndulus depint incapitai; ma arguai a s'òmini chi ndi betit su scàndulu!
</text:p>
      <text:p text:style-name="P591">18,8 Si sa manu tua o su pei tuu ti fait scàndulu/arrui in pecau, sega·ti·nde·ddu e fulia·nce·ddu; est mellus po tui a intrai a sa vida strupiau e tzopu, chi no a èssiri a duas manus e a duus peis  e chi ti nci ghetint a su fogu eternu.
</text:p>
      <text:p text:style-name="P592">18,9 E si s'ogu tuu ti fai scàndulu/ti fait arrui in pecau, boga·ti·nde·ddu e fulia·nce·ddu; mellus est po tui a intrai in sa vida bisogu, chi no a èssiri a duus ogus e chi ti nci ghetint a sa Geenna de su fogu.
</text:p>
      <text:p text:style-name="P593">18,10 Castiai·sì de no dipretziai a unu sceti de custus piticus, poita ca si naru ca is àngiulus insoru in celu biint sempri sa cara de su Babbu chi est in is celus.
</text:p>
      <text:p text:style-name="P594">18,11 [Est bènniu difatis su Fillu de s'òmini a sarvai su chi fiat pèrdiu].
</text:p>
      <text:p text:style-name="P595">18,12 Ita bosi ndi parit?  Si un'òmini tenit centu brebeis e si ndi perdit una, no at a lassai is norantanoi in monti, po andai a circai sa chi s’est pèrdia?
</text:p>
      <text:p text:style-name="P596">18,13 Si acontessit a dd'agatai, in beridadi bosi naru, s'at a allirgai prus po cussa chi no po is norantanoi chi no si fiant pèrdias.cun</text:p>
      <text:p text:style-name="P597">18,14 E aici etotu su Babbu bostu de is celus no bolit chi si ndi perdat mancu'unu de custus piticus.
</text:p>
      <text:p text:style-name="P598">18,15 Si fradi tuu at pecau contras a tui, bai e nara·ddi cosa a una parti; si t'ascurtat, t’as a àiri/t'as guadangiau a fradi tuu;
</text:p>
      <text:p text:style-name="P599">18,16 ma si no ascurtat, piga·tì in fatu una o duas personis, po chi ònnia cosa/paràula siat cunfirmada de su fueddu de duus o tres testimòngius.</text:p>
      <text:p text:style-name="P600">18,17 E si no ascurtat mancu a issus, nara·ddu a s'assemblea/comunidadi; e si no ascurtat mancu a s'assemblea, siat po tui che a un paganu e a unu publicanu.
</text:p>
      <text:p text:style-name="P601">18,18 In beridadi bosi naru: totu su chi acapiais in sa terra at a èssiri acapiau fintzas in celu e totu su chi eis a sciòlliri in sa terra at a a èssiri scapu/sciortu in celu.
</text:p>
      <text:p text:style-name="P602">18,19 In beridadi bosi torru a narai: si duus de bosàterus in sa terra s'ant a pònniri de acòrdiu po pediri cali si siat cosa, su Babbu miu chi est in is celus bosi dd'at a fàiri.
</text:p>
      <text:p text:style-name="P603"><text:s/>18,20 Ca aundi duus o tres s’adòbiant in nòmini miu, deu seu innia, in mesu insoru».
</text:p>
      <text:p text:style-name="P604">18,21 E Pedru si ddi fiat acostiau e dd'iat narau: «Sennori, cantu bortas apu a perdonai a fradi miu, si pecat contras a mei?   Fintzas a seti bortas?».
20,27 e su chi at a bòlliri èssiri su primu intre de bosàterus, at a èssiri scrau/tzeracu bostu;</text:p>
      <text:p text:style-name="P605">18,22 E Gesùs ddi iat arrespustu: «No ti naru fintzas a seti, ma fintzas a setanta bortas seti.
</text:p>
      <text:p text:style-name="P606">18,23 Po custu, su rennu de is celus s’assimbillat a unu rei chi iat bòfiu fàiri is contus cun is tzeracus suus.</text:p>
      <text:p text:style-name="P607">18,24 Cumentzaus is contus, dd'iant presentau a unu chi ddi depiat deximilla talentus.</text:p>
      <text:p text:style-name="P608">18,25 A cussu, sigumenti no podiat pagai, su meri iat cumandau a ddu bèndiri, cun sa mulleri, cun is fillus e cun totu su chi teniat, po chi essit pagau su dèpidu.</text:p>
      <text:p text:style-name="P609">18,26 Ma cussu serbidori, ghetendi·sì a terra ananti suu, ddi naràt: “Sennori, teni passièntzia cun mei e ti torru totu”.</text:p>
      <text:soft-page-break/>
      <text:p text:style-name="P610">18,27 Sendi ca su meri nd'iat tentu làstima de su tzeracu, dd'iat lassau andai e ddi iat perdonau su dèpidu.</text:p>
      <text:p text:style-name="P611">18,28 E candu  ci fiat bessiu, cussu tzeracu iat agatau a un'àteru tzeracu che a issu chi ddi depiat centu dinaris, dd'iat afferrau a su tzugu, ddu iat agangu narendide·ddi: “Torra·mì su chi mi depis!”.</text:p>
      <text:p text:style-name="P612">18,29 Su cumpàngiu suu, si fiat ghetau a terra e ddu pregàt narendi: "Teni passièntzia cun mei e ti torru totu".


</text:p>
      <text:p text:style-name="P613">18,30 Ma issu no iat bòfiu, fiat andau e nci dd'iat fatu ghetai a presoni, fintzas a candu iat a àiri pagau su dèpidu.
</text:p>
      <text:p text:style-name="P614">18,31 Biendi su chi fiat acontèssiu, is àterus tzeracus si ndi fiant dispraxus e fiant andaus a torrai contai totu.
.
</text:p>
      <text:p text:style-name="P615">18,32 Insaras su meri iat fatu tzerriai a cuss'òmini e ddi iat narau: "Tzeracu malu, deu t'apu perdonau totu su dèpidu poita ca m'as pregau.
</text:p>
      <text:p text:style-name="P616">18,33 Ellus no depias tui puru tènniri piedadi de su cumpàngiu tuu, aici cumenti deu nd’apu tentu piedadi de tui?".
</text:p>
      <text:p text:style-name="P617">18,34 E, arrenneghendi·sì, su meri dd'iat intregau in manus de is guàrdias, fintzas a ddi torrai totu su chi dèpidu.
</text:p>
      <text:p text:style-name="P618">18,35 Aici etotu at a fàiri a bosàterus Babbu miu, su chi est in is celus, si onniunu no perdonat de coru a su fradi».
</text:p>
      <text:p text:style-name="P619"> 19,1 Acabbaus custus arrexonus, Gesùs fiat mòviu de sa Galilea e fiat andau a sa regioni de sa Giudea, addei de su Giordanu.</text:p>
      <text:p text:style-name="P620">19,2 E areis de genti ddi iant postu in fatu e issu ddas iat sanadas innia.</text:p>
      <text:p text:style-name="P621">19,3 Insaras si ddi fiant acostiaus unus cantu fariseus po ddu  pònniri a prova ddi iant preguntau: «Lìcitu ddi est a (un'òmini) a nci bogai a sa mulleri po calisiat arrexoni?».</text:p>
      <text:p text:style-name="P622">19,4 E issu iat arrespustu: «Ellus no dd'eis lìgiu ca su Creadori de su cumintzu ddus iat fatus mascu e fèmina e iat narau:</text:p>
      <text:p text:style-name="P623">19,5 "Po custu s'òmini at a lassai a su babbu e a sa mama e s'at a auniri a sa mulleri e issus duus ant a èssiri una carri sceti?”</text:p>
      <text:p text:style-name="P624">19,6 Aici no funt prus duus, ma una carri sceti.  E duncas su chi Deus at auniu, s'òmini no ddu scrobit».</text:p>
      <text:p text:style-name="P625">19,7 Issus dd'abbetiant: «Poita insaras Mosè at cumandau a ddi donai un'àutu de arrefudu e a nci dda bogai?».</text:p>
      <text:p text:style-name="P626">19,8 E Gesùs ddis iat arrespustu: «Po mori de su coru tostau de bosàterus Mosè bosi at permìtiu de arrefudai/nci bogai a mulleris bostas, ma a princìpiu no fiat aici.</text:p>
      <text:p text:style-name="P627">19,9 E deu bosi naru: Chini arrefudat a sa mulleri, si no po unioni illegìtima, e si ndi cojat un'àtera fait adultèriu».</text:p>
      <text:p text:style-name="P628">19,10 Ddi iant torrau is discìpulus: «Si custa est sa cunditzioni intre maridu e mulleri, no cumbenit a si cojai».</text:p>
      <text:p text:style-name="P629">19,11 Issu ddis iat arrespustu: «No funt totus chi ddu podint cumprèndiri, ma sceti is chi si dd'ant donau a cumprèndiri.</text:p>
      <text:p text:style-name="P630">19,12 Nci at, difatis, eunucus chi funt nàscius aici de su sinu de sa mama; nci nd'at àterus chi ddus ant fatus eunucus is òminis, e nci nd'at àterus chi si funt fatus issus etotu eunucus po su rennu de is celus. Chini podit cumprèndiri cumprendat».</text:p>
      <text:p text:style-name="P631">19,13 Insaras nci dd'iant portau unus cantu pipius po ddis impònniri is manus e pregai; ma is discìpulus ddus iant certaus.
</text:p>
      <text:p text:style-name="P632">19,14 Gesùs perou ddis iat narau: "Lassai chi is pipius bengant a mei e no circheis de ddus firmai, ca de issus est su rennu de is celus».</text:p>
      <text:p text:style-name="P633">19,15 E a pustis de ddis àiri impostu is manus, si ndi fiat andau.</text:p>
      <text:p text:style-name="P634">19,16 E ecu ca si ddi fiat acostiau unu e dd'iat narau: «Maistu, ita depu fàiri de bonu po otènniri sa vida eterna?».
</text:p>
      <text:soft-page-break/>
      <text:p text:style-name="P635">19,17 Issu iat arrespustu: «Poita mi preguntas asuba de su chi est bonu? 
 Unu sceti est su bonu.  Si bolis intrai in sa vida, arrespeta is cumandamentus».</text:p>
      <text:p text:style-name="P636">19,18 E issu iat preguntau: «Cali cumandamentus?». 
 Gesùs iat arrespustu: «No bòcias, no fatzas adultèriu, no furis, no testimongis su frassu,</text:p>
      <text:p text:style-name="P637">19,19 onora a babbu tuu e a mama tua, ama a is àterus cumenti a tui etotu».
</text:p>
      <text:p text:style-name="P638">19,20 Su giòvunu dd'iat narau: «Apu sempri arrespetautotu custas cosas, ita est chi mi mancat ancora?».


</text:p>
      <text:p text:style-name="P639">19,21 Gesùs dd'iat narau: «Si bolis èssiri perfetu, bai, bendi su chi tenis e dona·ddu a is pòburus e in celu as a tènniri unu tesoru; a pustis beni e poni in fatu a mei».</text:p>
      <text:p text:style-name="P640"><text:s/>19,22 Intèndius custus fueddus, su giòvunu si ndi fiat andau tristu; giai ca teniat benis medas.</text:p>
      <text:p text:style-name="P641">19,23 Insaras Gesùs iat narau a is discìpulus suus: «In beridadi bosi naru: est difìcili chi un'arricu intrit in su rennu de is celus.
</text:p>
      <text:p text:style-name="P642">19,24 Si ddu torru a narai: est prus fàcili chi unu camellu nci passit in s'ogu de un'agu, chi no un'arricu intrit a su rennu de is celus».</text:p>
      <text:p text:style-name="P643">19,25 A custas paràulas is discìpulus fiant abarraus spantaus e iant preguntau: «E intzandus chini s'at a pòdiri sarvai?».
</text:p>
      <text:p text:style-name="P644">19,26 E Gesùs, castiendide·ddus firmu, iat narau: «Po is òminis custu est impossìbili, ma po Deus totu est pòssibili».
</text:p>
      <text:p text:style-name="P645">19,27 E Pedru pighendi su fueddu iat narau: «Ecu, nosu eus lassau totu e t'eus postu in fatu; duncas ita s'at a tocai a nosu?».
</text:p>
      <text:p text:style-name="P646">19,28 E Gesùs ddis iat narau: «In beridadi bosi naru: bosàterus chi m'eis postu infatu, in sa creatzioni noa, candu su Fillu de s'òmini s'at a sètziri in sa trona de sa glòria sua, bosàterus puru s'eis a sètziri in doxi tronas a giudicai a is doxi tribùs de Israeli.
</text:p>
      <text:p text:style-name="P647">19,29 Chini at àiri lassau domus, o fradis, o sorris, o babbus, o mamas, o fillus, o cungiaus  in nòmini miu, nd’at a pigai centu bortas tanti e at a eredai sa vida eterna.
</text:p>
      <text:p text:style-name="P648">19,30 Medas de is primus ant a èssiri is ùrtimus e is ùrtimus is primus».</text:p>
      <text:p text:style-name="P649">20,1 «Ca su rennu de is celus est che a unu meri de domu chi fiat essiu a mengianu chitzi po acodrai giorronaderis a trabballai sa bìngia sua.</text:p>
      <text:p text:style-name="P650">20,2 Candu iat agiustau cun issus po unu dinai a sa dii, nci ddus iat mandaus a sa bìngia sua.</text:p>
      <text:p text:style-name="P651">20,3 E candu faci a is noi oras de a mengianu fiat essiu e nd’iat bistu àterus chi fiant me in sa pratza a s’afainu</text:p>
      <text:p text:style-name="P652">20,4 e ddis iat narau: "Baxei bosàterus puru a sa bìngia mia; su chi est giustu bosi dd’apu a donai". 20,5 E issus fiant andaus.</text:p>
      <text:p text:style-name="P653"> Torrau a essiri faciora de mesudì e faciora de is tres e iat fatu aici etotu.</text:p>
      <text:p text:style-name="P654">20,6 Faciora de is cincu fiat torrau a essiri, nd'iat agatau àterus chi fiant innia e ddis iat narau: "Poita aturais innoi totu sa dii a s’afainu?".</text:p>
      <text:p text:style-name="P655">20,7 Ddi iant arrespustu: "Poita ca nemus s'at pigau a giorronada".  E issu ddis iat narau: "Baxei bosàterus puru a sa bìngia mia".</text:p>
      <text:p text:style-name="P656">20,8 Candu iat scurigau, su meri de sa bìngia iat narau a su fatori suu: "Tzèrria a is giorronaderis e dona·ddis sa paga, cumentzendi de is ùrtimus fintzas a is primus".</text:p>
      <text:p text:style-name="P657">20,9 Bènnius is de is cincu de a merì, iant pigau unu dinai a cada de unu.</text:p>
      <text:p text:style-name="P658">20,10 Candu fiant lòmpius is primus, s'iant crètiu ca ndi ddis tocat de prus.  Ma issus puru iant arriciu a cada de unu dinai peròmini.</text:p>
      <text:p text:style-name="P659">20,11 E pighendide·ddu, murrugiànt contras a su meri narendi:</text:p>
      <text:p text:style-name="P660">20,12 "Is ùrtimus ant trabballau un'ora sceti e ddus as ugaliaus a nosu, chi eus aguantau su pesu de sa dii e su fogori”.</text:p>
      <text:soft-page-break/>
      <text:p text:style-name="P661">20,13 Ma su meri, arrespundendi a unu de issus, iat narau: "Amigu, deu no seu fendu·dì ingiustìtzia.  Ellus no si fiaus abarraus de acòrdiu po unu dinai?</text:p>
      <text:p text:style-name="P662">20,14 Piga su tuu e bai·ti·ndi; deu bollu donai a cust'ùrtimu puru cantu a tui.</text:p>
      <text:p text:style-name="P663">20,15 De is cosas mias no ndi potzu fàiri su chi bollu? 
 O tui ses imbidiosu ca deu seu bonu?".</text:p>
      <text:p text:style-name="P664">20,16 Aici is ùrtimus ant a èssiri is primus, e is primus is ùrtimus».</text:p>
      <text:p text:style-name="P665">20,17 In s'interis chi fiat artziendi a Gerusalemmi, Gesùs s'iat pigau a is doxi a una parti e in sa bia ddis iat narau:</text:p>
      <text:p text:style-name="P666">20,18 «Labai, nosu seus aviendi a Gerusalemi e su Fillu de s'òmini dd'ant a intregai a is sacerdotus majoris e a is scribas, chi dd'ant a cundennai a morti</text:p>
      <text:p text:style-name="P667">20,19 e dd'ant a intregai a is paganus po si ndi befai, po dd'aciotai e po  ddu incravai; e a sa de tres diis at a arresuscitai».</text:p>
      <text:p text:style-name="P668">20,20 Tandu si ddi fiat acostiada sa mama de is fillus de Zebedeu cun is fillus, e si  fiat ghetada a terra po ddi pediri calincuna cosa.</text:p>
      <text:p text:style-name="P669">20,21 E issu dd'iat preguntau: «Ita bolis?».  Dd'iat arrespustu: «Nara chi custus duus fillus mius setzant unu a manu dereta tua e unu a manu manca tua in su rennu tuu».</text:p>
      <text:p text:style-name="P670">20,22 E iat arrespustu Gesùs: «Bosàterus no scieis su chi seis pedendi.   Podeis bufai su càlixi chi seu acanta de bufai deu?». Dd'arrespundint: «Gei podeus».</text:p>
      <text:p text:style-name="P671">20,23 E issu iat aciuntu: «Su càlixi miu si dd'eis a bufai; ma no tocat a mei a acantzai chi si setzais a dereta o a manca mia, ma est po is chi si dd'at aprontau su Babbu miu».</text:p>
      <text:p text:style-name="P672">20,24 Is àterus dexi intendendi custu, si fiant inchietaus cun is duus fradis;</text:p>
      <text:p text:style-name="P673">20,25 ma Gesùs, ddus iat tzerriaus e ddis iat narau: «Bosàterus ddu scieis, is capus de is natzionis si ndi faint meris e is mannus ddas tenint in poderi.</text:p>
      <text:p text:style-name="P674">20,26 Intre bosàterus no at a èssiri aici; ma su chi at a bòlliri fàiri mannu intre de bosàterus at a èssiri serbidori bostu,</text:p>
      <text:p text:style-name="P675">20,28 pròpriu cumenti a su Fillu de s'òmini, chi no est bènniu po si fàiri serbiri/èssiri sèrbiu, ma po serbiri e donai sa vida sua in arrescatu de medas».</text:p>
      <text:p text:style-name="P676">20,29 Cumenti ndi essiant de Gèricu, una truba de genti poniat in fatu a Gesùs.</text:p>
      <text:p text:style-name="P677">20,30 E ecu duus tzurpus, sètzius in s'oru de sa bia. Cumenti iant intèndiu ca Gesùs fiat passendi, iant atacau a aboxinai: «Sennori, teni piedadi de nosu, fillu de Dàvidi!».</text:p>
      <text:p text:style-name="P678">20,31 Sa genti ddus certàt po si citiri; ma issus aboxinànt prus a forti: «Sennori, fillu de Dàvidi, teni pietadi de nosu!».</text:p>
      <text:p text:style-name="P679">20,32 Gesùs, si fiat firmau, ddus iat tzerriaus e iat narau. «Ita boleis a si fàiri deu».</text:p>
      <text:p text:style-name="P680">20,33 Dd'iant arrespustu: «Sennori, chi is ogus nostus s'aberrant!».</text:p>
      <text:p text:style-name="P681">20,34 Gesùs nd'iat tentu cumpassioni, ddis iat tocau is ogus e in deretura iant torrau a biri e ddi poniant in fatu.	
</text:p>
      <text:p text:style-name="P682">21,1 Candu fiant acanta de Gerusalemmi e fiant lòmpius a Bètfage, a su Monti de is Olias, Gesùs iat mandau a duus  discìpulus suus</text:p>
      <text:p text:style-name="P683">21,2 narendide·ddis: «Baxei a sa bidda chi est faci a bosàterus: luegus eis a agatai una burrica acapiada e cun issa unu pudreddu.  Scapiainde·ddus e betei·mi·nde·ddus.
</text:p>
      <text:p text:style-name="P684">21,3 Si calincunu si narat cosa dd'eis a arrespùndiri/arrespundeide·ddi: "Su Sennori ndi tenit abbisòngiu, ma ndi ddus mandat luegus"».</text:p>
      <text:p text:style-name="P685">21,4 Custu fiat incapitau po si cumpriri su chi iat annuntziau su profeta:
</text:p>
      <text:p text:style-name="P686">21,5 Naraide·ddi a sa filla de Sion: 
"Càstia, su rei tuu benit a tui ùmili, sètziu a burrica e cun unu pudreddu fillu de bestiolu".
</text:p>
      <text:p text:style-name="P687">21,6 Is discìpulus fiant andaus e iant fatu su chi ddis iat cumandau Gesùs:
</text:p>
      <text:soft-page-break/>
      <text:p text:style-name="P688">21,7 nci iant portau sa burrinca e su pudreddu, nci ddis iant ghetau asuba is manteddus, e issu si ddoi fiat sètziu.
</text:p>
      <text:p text:style-name="P689">21,8 S'arei manna de genti iat stèrriu is manteddus in s'arruga e intamis àterus segànt nais de is matas e ddas sterriant in s'arruga.
</text:p>
      <text:p text:style-name="P690">21,9 Sa genti chi andàt ananti e sa chi sodigàt in fatu, aboxinàt:
«Osanna a su fillu de Dàvidi!
Beneitu su chi benit in nòmini
de su Sennori! 
Osanna in su prus artu de is celus!».
</text:p>
      <text:p text:style-name="P691">21,10 Candu Gesùs fiat intrau a Gerusalemmi, totu sa citadi fiat in avolotu e sa genti si preguntàt: «E chini est custu?».
</text:p>
      <text:p text:style-name="P692">21,11 E sa genti arrespundiat: «Custu est su profeta Gesùs, de Nazaret in Galilea».
</text:p>
      <text:p text:style-name="P693">21,12 Gesùs fiat intrau a su tèmpiu e nci iat bogau a totus is chi fiant comporendi e bendendi; nci iat furriau/bortulau is mesas de is cambiadoris de dinai e is cadiras de is bendidoris de columbas</text:p>
      <text:p text:style-name="P694">21,13 e ddis iat narau: «Est Scritu:
A domu mia dd'ant a narai domu de oratzioni
ma bosàterus ndi seis fendi una gruta  de furonis!».
</text:p>
      <text:p text:style-name="P695">21,14 Si ddi acostiànt tzurpus e strupiaus in su tèmpiu e issu ddus iat sanaus.</text:p>
      <text:p text:style-name="P696">21,15 Ma is sacerdotus majoris e is scribas, biendi is spantus chi faiat e is piciocheddus aboxinendi in su tèmpiu: «Osanna a su fillu de Dàvidi», si fiant arrennegaus</text:p>
      <text:p text:style-name="P697">21,16 e dd'iant narau: «No ddu intendis su chi narant?».
 Gesùs ddis iat arrespustu: «Eja, no eis lìgiu mai: 
De sa buca de is pipius e de is creaduras t'as procurau una làudi?/alabantza?».</text:p>
      <text:p text:style-name="P698">21,17 E, lassendide·ddus, nci fiat bessiu de sa citadi, conca a Bètania, e ddoi iat passau sa noti.</text:p>
      <text:p text:style-name="P699">21,18 Su mengianu a pustis, furriendi a sa citadi, dd'iat pigau fàmini.</text:p>
      <text:p text:style-name="P700">21,19 E biendi una mata de figu in sa bia, si ddi fiat acostiau, ma no ddoi iat agatau àteru che folla, e dd'iat narau: «Mai prus nàsciat frutu de tui».  E in deretura sa mata si fiat sicada.</text:p>
      <text:p text:style-name="P701">21,20 Biendi custu is discìpulus fiant spantaus e narànt/narànt spantaus: «Cumenti est chi sa mata de sa figu s'est sicada in deretura?».
</text:p>
      <text:p text:style-name="P702">21,21 Iat arrespustu Gesùs: «In beridadi bosi naru: Si teneis fidi e no dudais, no sceti eis a fàiri su chi est acuntèssiu a custa mata, ma fintzas si ddi narai a custu monti: "Pesadi·ndi de inguni e gheta·ti·nci a mari,  custu at a acontèssiri".
</text:p>
      <text:p text:style-name="P703">21,22 E totu su chi eis a pediri preghendi cun fidi, dd'eis a arriciri».
</text:p>
      <text:p text:style-name="P704">21,23 Intrau a su tèmpiu, in s'interis chi fiat donendi imparu si ddi fiant acostiaus is sacerdotus majoris e is mannus de su pòpulu narendi:  «Chini ti dd’at donada custa autoridadi?».
</text:p>
      <text:p text:style-name="P705">21,24 Gesùs ddis iat arrespustu: «Deu puru bosi apu a fàiri una pregunta e si bosàterus m'arrespundeis s'apu a narai fintzas cun cali autoridadi fatzu custas cosas».</text:p>
      <text:p text:style-name="P706">21,25 Su batiari de Giuanni de innui beniat?  De is celus/De Deus o de is òminis?».  E issus pentzànt intre sei narendi: «Si naraus: "de is celus/De Deus", s'at a arrespùndiri: "poita no dd'eis crètiu?";</text:p>
      <text:p text:style-name="P707">21,26 si naraus "De is òminis", timeus a sa genti, ca totus a Giuanni ddu cunsiderant cumenti a unu profeta».</text:p>
      <text:p text:style-name="P708">21,27 Insaras arrespundendi a Gesùs, narànt: «No ddu scieus».  E issu ddis iat torrau: «Mancu deu bosi naru cun cali autoridadi fatzu custas cosas».
</text:p>
      <text:p text:style-name="P709">21,28 «Ita si ndi parit?  Un'òmini teniat duus fillus. Acostiendi·sì a su primu e dd'iat narau: "Fillu miu, bai e trabballa in sa bìngia”.
</text:p>
      <text:p text:style-name="P710">21,29 E issu ddi iat arrespustu: "Sissi, sennori"; ma no ddoi fiat andau.
</text:p>
      <text:p text:style-name="P711">21,30 E a su segundu, dd'iat narau sa pròpiu cosa.  E issu dd’iat arrespustu: "No ndi tengu gana"; ma a pustis, si ndi fiat pentiu, e ddoi fiat andau.
</text:p>
      <text:p text:style-name="P712">21,31 Chini de is duus at fatu sa voluntadi de su babbu?».  «S'ùrtimu» narànt.  E Gesùs ddis iat narau: «In beridadi bosi naru: is publicanus e is prostitutas/meretricis bosi nci passant ananti in su rennu de Deus.</text:p>
      <text:soft-page-break/>
      <text:p text:style-name="P713">21,32 Ca Giuanni est bènniu a bosàterus in sa bia de sa giustìtzia e bosàterus no dd'eis crètiu; is publicanus e is prostitutas/meretricis intamis dd'ant crètiu.  Ma bosàterus, mancai apendi bistu custas cosas, a pustis no si seis mancu pentius po ddi crèiri».</text:p>
      <text:p text:style-name="P714">21,33 «Ascurtai un'àtera paràbula: Unu meri at postu una bìngia e dd'iat ingiriada a cresura, iat stuvau unu unu lacu, nd'iat pesau una turri, a pustis dd'iat donada a mesu a pari a unus cantu bingiaderis e si ndi fiat andau.</text:p>
      <text:p text:style-name="P715">21,34 Candu fiat lòmpiu su tempus de sa binnenna, iat mandau is serbidoris suus anca fiant is bingiaderis po ndi leai sa parti sua.</text:p>
      <text:p text:style-name="P716">21,35 Ma cussus bingiaderis iant aciapau a is serbidoris e a unu dd'iant arropau, a s'àteru dd'iant bociu, e a un'àteru dd'iant apedriau.
</text:p>
      <text:p text:style-name="P717">21,36 Iat torrau a mandai àterus serbidoris, prus de is primus, ma cuddus iant fatu a sa pròpiu manera/su pròpiu.</text:p>
      <text:p text:style-name="P718">21,37 A ùrtimu ddis iat mandau a su fillu narendi: “A fillu miu dd'ant a arrespetai!”.</text:p>
      <text:p text:style-name="P719">21,38 Ma cuddus bingiaderis biendi a su fillu, iant narau intre issuss: Custu est s'eredi; Ajò ca ddu boceus, e s'eredidadi at a èssiri sa nosta.</text:p>
      <text:p text:style-name="P720">21,39 E, dd'iant aciapau, nci dd'iant bogau a foras de sa bìngia e dd'iant bociu.</text:p>
      <text:p text:style-name="P721">21,40 Candu at a torrai su meri de sa bìngia ita ddis at a fàiri a cussus bingiaderis?».</text:p>
      <text:p text:style-name="P722">21,41 Dd'arrespundint: «At a bociri chene de piedadi a cussus òminis malus e at a intregai sa bìngia a àterus bingiaderis chi dd'ant a donai is frutus candu lòmpit su tempus».</text:p>
      <text:p text:style-name="P723">21,42 E Gesùs ddis iat narau: «No dd'eis lìgiu mai in is Scrituras:
Sa pedra chi is maistus de muru ant scartau, immoi
est pedra de assentu;
custu dd'at fatu su Sennori
no est cosa de spantu po is ogus nostus?
</text:p>
      <text:p text:style-name="P724"> 21,43 Po cussu deu si naru: bosi nd'ant a leai su rennu de Deus e dd'ant a donai a unu pòpulu chi at a bogai frutu.</text:p>
      <text:p text:style-name="P725">21,44 Chini at a arrùiri asuba de custa pedra s'at a sfasciai/arrogai; e si nci at arrùiri asuba a calincunu, dd'at a strecai».</text:p>
      <text:p text:style-name="P726">45 Intèndiu chi iant custas paràbulas, is sacerdotus majoris e is fariseus iant cumprèndiu ca fueddàt de issus e fiant circhendi de dd'aciapai; ma timiant a sa genti ca ddu cunsideràt unu profeta.
</text:p>
      <text:p text:style-name="P727">22,1 E Gesùs iat torrau a ddis fueddai in paràbulas narendi:
</text:p>
      <text:p text:style-name="P728">22,2 «Su rennu de is celus assimbillat a unu rei chi at cuncordau unu cumbidu po sa coja de su fillu.</text:p>
      <text:p text:style-name="P729">22,3 Issu iat mandau a is tzeracus uus a tzerriai a is cumbidaus a sa coja, ma cussus no ddoi fiant bòfius andai.
</text:p>
      <text:p text:style-name="P730">22,4 Iat torrau a mandai àterus serbidoris a narai: "Mi’ apu aprontau su cumbidu miu; is bois e is bèstias ingrassadas funt giai maceddadas e totu est prontu; benei a sa coja".
</text:p>
      <text:p text:style-name="P731">22,5 Ma cussus no ndi iant fatu contu e si ndi fiant andaus chini a su cungiau suu, chini a is fainas suas;
</text:p>
      <text:p text:style-name="P732">22,6 àterus iant aciapau a is tzeracus suus, ddus iant ingiuraus e bocius.
</text:p>
      <text:p text:style-name="P733">22,7 Insaras su rei si fiat arrennegau e, mandadas is tropas suas, iat bociu a cussus assassinus e iat apuntau fogu a sa citadi insoru.
</text:p>
      <text:p text:style-name="P734">22,8 A pustis iat narau a is tzeracus suus: "Su cumbidu de sa coja est prontu, ma is cumbidaus no ndi fiant dìnnius;
</text:p>
      <text:p text:style-name="P735">22,9 immoi baxei a is gruxeris de is bias e totus is chi agatais, ddus cumbidaide·ddus a sa coja. 
</text:p>
      <text:p text:style-name="P736">22,10 Bessius me is bias, cuddus tzeracus nd'iant boddiu cantus ndi iant agatau, bonus e malus, e s'aposentu de sa coja si fiat prenu /sa coja si fiat prena de cumbidaus.</text:p>
      <text:p text:style-name="P737">22,11 Su rei fiat intrau po biri is cumbidaus e, biendi a unu chi no portàt sa bestimenta de sa coja,
</text:p>
      <text:p text:style-name="P738">22,12 dd'iat narau: “Amigu, cumenti as fatu a intrai a innoi chene sa bestimenta de sa coja?”.  E issu fiat abarrau a sa muda.
</text:p>
      <text:soft-page-break/>
      <text:p text:style-name="P739">22,13 Insaras su rei iat cumandau a is serbidoris: "Acapiaide·ddu manus e peis e ghetai·nce·ddu a foras a su scuriu; innia ddoi at a àiri prantu e tzichirriu de dentis".
</text:p>
      <text:p text:style-name="P740">22,14 Ca medas funt is tzerriaus, ma pagus is eletus».
</text:p>
      <text:p text:style-name="P741">22,15 Insaras is fariseus, si fiant arretiraus, iant fatu unu consillu po cumenti circai de dd'aciapai in faddina in calincunu fueddu suu.
</text:p>
      <text:p text:style-name="P742">22,16 Nci dd'iant mandau is discìpulus insoru cun is erodianus, a ddi narai: «Maistu, ddu scieus ca ses beridadosu e imparas/ammostas sa bia de Deus in sa beridadi e no ndi fais contu de/no timis a nemus ca no càstias in faci a òmini.
</text:p>
      <text:p text:style-name="P743">22,17 Nara·sì duncas su parri tuu: Est lìcitu  o no a pagai su tributu a Cèsari?».
</text:p>
      <text:p text:style-name="P744">22,18 Ma Gesùs, connoscendi s’idea mala insoru, ddis iat arrespustu: «Ipòcritas poita mi tenteais/poita est chi poneis a prova?
</text:p>
      <text:p text:style-name="P745">22,19 Ammostai·mì sa moneda de su tributu».  E issus ddi iant presentau unu dinari.
</text:p>
      <text:p text:style-name="P746">22,20 E issu ddis iat preguntau: «De chini est custa màgini e custu scritu/s'iscritzioni?».
</text:p>
      <text:p text:style-name="P747">22,21 Dd'iant arrespustu: «De Cèsari».  E insaras ddis iat narau: «Torrai duncas a Cèsari su chi est de Cèsari e a Deus su chi est de Deus».
</text:p>
      <text:p text:style-name="P748">22,22 A custus fueddus fiant abarraus spantaus e lassendide·ddu si ndi fiant andaus.
</text:p>
      <text:p text:style-name="P749">22,23 E sa dii etotu fiant acostiaus anca fiat issu unus cantu sadduceus, chi afirmànt/narànt ca no nc'at arresurretzioni, e ddi iant preguntau:
</text:p>
      <text:p text:style-name="P750">22,24 «Maistu, Mosè iat narau: Si calincunu si morit chene fillus, su fradi s'at a cojai cun sa fiuda e aici at a donai un'eredeu a su fradi.
</text:p>
      <text:p text:style-name="P751">22,25 Immoi, in mesu a nosu ddoi iat seti fradis; su primu cumenti si fiat cojau si fiat mortu e, giai ca no teniat fillus, iat lassau sa mulleri a su fradi</text:p>
      <text:p text:style-name="P752">22,26 E aici etotu iant fatu su de duus, e su de tres, fintzas a su de seti.
</text:p>
      <text:p text:style-name="P753">22,27 A s'acabbu, a pustis de totus, si fiat morta fintzas sa fèmina.</text:p>
      <text:p text:style-name="P754"><text:s/>22,28 In s'ora de s'arresurretzioni, de cali de is seti at a èssiri mulleri? Giai ca totus si dd'ant cojada».
</text:p>
      <text:p text:style-name="P755">22,29 E Gesùs ddis iat arrespustu: «Bosàterus seis faddendi·sì/in faddina, ca no connosceis is Scrituras e sa potèntzia de Deus.
</text:p>
      <text:p text:style-name="P756">22,30 In s'arresurretzioni no si pigat ni mulleri ni maridu, ma funt che a àngelus in is celus.
</text:p>
      <text:p text:style-name="P757">22,31 Torrendi a su contu de s'arresurretzioni de is mortus, no dd'eis lìgiu su chi bosi iat narau Deus:</text:p>
      <text:p text:style-name="P758">22,32<text:s/>Io sono il Dio di Abramo e il Dio di Isacco e il Dio di Giacobbe? 22,32 Deu seu su Deus de Abramu e su Deus de Isacu e su Deus de Giacobu? No est su Deus de is mortus, ma su Deus de is bius!».
</text:p>
      <text:p text:style-name="P759">22,33 Intendendi custu, sa genti fiat spantada po sa dotrina sua.
</text:p>
      <text:p text:style-name="P760">22,34 Tandu is fariseus, intendendi ca issu iat serrau sa buca a is sadduceus, si fiant assoddius  apari
</text:p>
      <text:p text:style-name="P761">22,35 e unu de issus, unu dotori de sa lei, dd'iat interrogau po ddu pònniri a prova:</text:p>
      <text:p text:style-name="P762">22,36 «Maistu, cali est su cumandamentu  de sa lei su prus mannu?».</text:p>
      <text:p text:style-name="P763">22,37 Ddi iat arrespustu: «As a stimai su Sennori Deus tuu cun totu su coru tuu, cun totu s'ànima tua e cun totu sa menti tua.
</text:p>
      <text:p text:style-name="P764">22,38 Custu est su prus mannu e su primu de is cumandamentus.
</text:p>
      <text:p text:style-name="P765">22,39 E su segundu assimbillat a su primu: As a stimai a is àterus cumenti a tui etotu.
</text:p>
      <text:p text:style-name="P766">22,40 De custus duus cumandamentus dipendint totu sa Lei e is Profetas».</text:p>
      <text:p text:style-name="P767">22,41 Candu is fariseus fiant assoddius apari, Gesùs ddis iat preguntau:
</text:p>
      <text:p text:style-name="P768">22,42 «Ita ndi pentzais de su Messia?22,42  Fillu de chini est?».  Ddi iant arrespustu: «De Dàvidi».
</text:p>
      <text:soft-page-break/>
      <text:p text:style-name="P769">22,43 E issu ddis iat torrau: «E insaras poita Dàvidi, mòviu de su Spìridu Santu, ddi narat "Sennori", narendi:
</text:p>
      <text:p text:style-name="P770">22,44 At narau su Sennori a su Sennori miu:
Setzi·tì a manu dereta mia,
fintzas a candu nci apu a pònniri a is nemigus tuus
asuta de is peis tuus?
</text:p>
      <text:p text:style-name="P771">22,45 Si duncas Dàvidi ddi narat "Sennori", cumenti podit èssiri fillu suu?».</text:p>
      <text:p text:style-name="P772">22,46 Nemus fiat bonu a dd'arrespùndiri nudda; e nemus, de sa dii, si fiat prus atriviu a ddu interrogai.
</text:p>
      <text:p text:style-name="P773">23,1 Insaras Gesùs iat fueddau a sa genti e a is discìpulus suus narendi:</text:p>
      <text:p text:style-name="P774">23,2 «In pitzus de sa càtedra de Mosè si funt sètzius is scribas e is fariseus.</text:p>
      <text:p text:style-name="P775"><text:s/>23,3 Fadei e ponei menti a totu su chi bosi narant, ma no fatzais segundu is òperas insoru, ca narant ma/e no faint.</text:p>
      <text:p text:style-name="P776">23,4 Ca acàpiant pesus grais e ddus càrrigant a coddu a sa genti, ma issus etotu no ddus bolint mòviri mancu cun unu didu.</text:p>
      <text:p text:style-name="P777">23,5 Totu is òperas insoru ddas faint po si fàiri a biri de is òminis: allargant/ammanniant is stùgius/filateris e allonghiant is fràngias insoru;</text:p>
      <text:p text:style-name="P778">23,6 ddis praxint is postus de onori in is cumbidus e is primus postus, in is sinagogas,</text:p>
      <text:p text:style-name="P779">23,7 e is saludus in is pratzas, e chi sa genti ddi nerit "rabbi".</text:p>
      <text:p text:style-name="P780">23,8 Ma bosàterus no si fatzais narai "rabbi", ca su maistu bostu est unu sceti e bosàterus seis totu fradis.</text:p>
      <text:p text:style-name="P781">23,9 E no nareis "babbu" a nisciunus in sa terra, ca unu sceti est Babbu bostu, su chi est in is celus.</text:p>
      <text:p text:style-name="P782">23,10 E no si fatzais narai "maistus", ca unu sceti est su Maistu bostu, su Cristu.</text:p>
      <text:p text:style-name="P783">23,11 Su prus mannu intre bosàterus at a èssiri serbidori bostu;</text:p>
      <text:p text:style-name="P784">23,12 chini intamis s'at a fàiri mannu at a èssiri abasciau e chini s'at a abasciai at a èssiri fatu mannu.</text:p>
      <text:p text:style-name="P785">23,13 Arguai a bosàterus, scribas e fariseus ipòcritas, ca serrais su rennu de is celus in faci a is òminis; ca no ddoi intrais bosàterus, e no lassais intrai nemancu is chi ddoi bolint intrai.</text:p>
      <text:p text:style-name="P786">23,14 [Ca nci ingurteis is benis de is fiudas, e po si fàiri biri si stentais in pregadorias longas; e po cussu s'at a tocai una cundenna prus manna»].</text:p>
      <text:p text:style-name="P787">23,15 Arguai a bosàterus, scribas e fariseus ipòcritas, ca andais peri su mari e peri sa terra a fàiri unu prosèlitu sceti e, candu dd'eis cunvertiu ddu feis fillu de sa Gennaa duas bortas prus de bosàterus.</text:p>
      <text:p text:style-name="P788">23,16 Arguai a bosàterus, ghias tzurpas, chi narais: A giurai po su tèmpiu no balit, ma a giurai po s'oru de su tèmpiu obbrigat/ddoi est s'òbrigu.</text:p>
      <text:p text:style-name="P789">23,17 Macus e tzurpus: ita est prus mannu, s'oru o su tèmpiu chi fait s'oru sacru?
</text:p>
      <text:p text:style-name="P790">23,18 E narais: A giurai po s'artari no balit, ma a giurai po s'oferta chi ddoi est asuba, òbbrigat/ddoi est s'òbrigu</text:p>
      <text:p text:style-name="P791">23,19</text:p>
      <text:p text:style-name="P792">.23,19 Tzurpus!  Ita est prus manna, s'oferta o s'artari chi fait s'oferta sacra?</text:p>
      <text:p text:style-name="P793">23,20 Po tantis, chini giurat po s'artari, giurat po s'artari/po cussu e po cantu ddoi est asuba;
</text:p>
      <text:p text:style-name="P794">23,21 e chini giurat po su tèmpiu, giurat po cussu e po Su chi ddoi bivit.</text:p>
      <text:p text:style-name="P795">23,22 E chini giurat po su celu, giurat po sa trona de Deus e po Su chi ddoi est sètziu.</text:p>
      <text:p text:style-name="P796">23,23 Arguai a bosàterus, scribas e fariseus ipòcritas, chi pagais sa dèguma de sa amenta, de sa tzichirria e de su cuminu, e lassais a una banda su chi est de prus importu de sa lei: sa giustìtzia, sa misericòrdia e sa fidelidadi.  Custas cosas fiat a praticai; chene trascurai is àteras.</text:p>
      <text:p text:style-name="P797">23,24 Ghias tzurpas, chi colais su muschitu ma nci ingurteis su/unu camellu!
</text:p>
      <text:soft-page-break/>
      <text:p text:style-name="P798">23,25 Arguai a bosàterus, scribas e fariseus ipòcritas, chi limpiais a parti de foras sa tassa e su pratu intamis aintru funt prenus de fura e de disatinu.</text:p>
      <text:p text:style-name="P799">23,26 Fariseu tzurpu, innantis lìmpia a parti de aintru de sa tassa, po chi siat lìmpia a parti de foras puru!</text:p>
      <text:p text:style-name="P800">23,27 Arguai a bosàterus, scribas e fariseus ipòcritas, chi assimbillais a tumbas imbrachinadas: chi funt bellas a ddas biri a parti de foras, ma aintru funt prenas de ossus de mortus e de ònnia brutori.</text:p>
      <text:p text:style-name="P801">23,28 Aici bosàterus puru pareis giustus a parti de foras ananti de is òminis, ma aintru seis prenus de ipocrisia e de malesa.</text:p>
      <text:p text:style-name="P802">23,29 Arguai a bosàterus, scribas e fariseus ipòcritas, chi ndi pesais is tumbas de is profetas e mudais is tumbas de is giustus,
</text:p>
      <text:p text:style-name="P803">23,30 e narais: Chi fiaus bìvius a su tempus de babbus nostus, no iaus a àiri pigau parti paris cun issus a ghetai su sànguni de is profetas;</text:p>
      <text:p text:style-name="P804">23,31 narendi aici testimoniais, contras a bosàterus etotu, de èssiri fillus de is chi ant bociu a is profetas.</text:p>
      <text:p text:style-name="P805">23,32 Umprei, duncas, sa mesura de babbus bostus!</text:p>
      <text:p text:style-name="P806">23,33 Colorus, arratza de pìberas, cumenti si nd'eis a scampai de sa cundenna/giudìtziu de sa Geenna?</text:p>
      <text:p text:style-name="P807">23,34 Po custu mirai, deu bosi mandu profetas, sàbius e scribas; de custus unus cantu ddus eis a bociri e incravai a sa gruxi, àterus ddus eis a aciotai in is sinagogas bostas e ddus eis a persighiri de citadi in citadi;
</text:p>
      <text:p text:style-name="P808">23,35 po chi si nci torrit a arrui asuba totu su sànguni de is giustus spartu asuba de sa terra, de su sànguni de Abeli su giustu fintzas a su sànguni de Zacaria, fillu de Barachia, chi eis bociu intremesu de su santuàriu e s'artari.
</text:p>
      <text:p text:style-name="P809">23,36 In beridadi bosi naru, totu custas cosas nd'ant a torrai a arrui a pitzus a custa generatzioni.</text:p>
      <text:p text:style-name="P810">23,37 Gerusalemmi, Gerusalemmi, chi bocis is profetas e apedrias a is chi ti mandant, cantu bortas apu disigiau de arregòlliri a pari a fillus tuus, cumenti a una pudda chi aciocat is pilloneddus asuta de is alas, e bosàterus no eis bòfiu!</text:p>
      <text:p text:style-name="P811">23,38 Mi’: domu bosta si dda lassant sbùida!</text:p>
      <text:p text:style-name="P812">23,39 Deu si naru ca de immoi innantis no m'eis a biri prus fintzas a candu (no) eis a narai: Beneitu /su chi benit in nòmini de su Sennori!».</text:p>
      <text:p text:style-name="P813">24,1 E Gesùs ndi fiat bessiu de su tèmpiu e fiat andendi·si·ndi, e si ddi fiant acostiaus is discìpulus suus po dd'ammostai is fabbrìcus de su tèmpiu.</text:p>
      <text:p text:style-name="P814"><text:s/>24,2 Gesùs ddis iat narau: «Ddas bieis totu custas cosas?  In beridadi bosi naru, no at a abarrai innoi pedra asuba de pedra totu nd'at a èssiri scisciau»</text:p>
      <text:p text:style-name="P815">24,3 E cumenti fiat sètziu in su monti de is Olias, is discìpulus suus si ddi fiant acostiaus e, a una parti, ddi iant narau: «Nara·sì candu ant a acuntèssiri custas cosas, e cali at a èssiri su sinnu de sa bènnida tua e de s'acabbu de su mundu».</text:p>
      <text:p text:style-name="P816">24,4 Gesùs iat arrespustu: «Avetei chi nemus bosi trampit;</text:p>
      <text:p text:style-name="P817">24,5 medas ant a bènniri in nòmini miu, narendi: "Deu seu su Cristu", e ant a trampai a medas.</text:p>
      <text:p text:style-name="P818">24,6 Eis a intèndiri de gherras e de arremòrius de gherras.  Castiai de no si spantai; ca totu custu depit acuntèssiri, ma no est ancora sa fini.</text:p>
      <text:p text:style-name="P819">24,7 Natzioni s'at a pesai contras a natzioni e rennu contras a rennu; ddoi at a àiri carestias e terremotus in medas logus;</text:p>
      <text:p text:style-name="P820">24,8 ma totu custu est sceti su cumìntzu de is dolorias.</text:p>
      <text:p text:style-name="P821">24,9 Tandu s'ant a intregai a su trumentu e s'ant a bociri, e eis a èssiri in òdiu a totu is pòpulus po mori de su nòmini miu.</text:p>
      <text:p text:style-name="P822">24,10 Medas nd'ant tènniri scàndulu, e issus s'ant a traìxiri e s'ant a tènniri in òdiu s'unu cun s'àteru.</text:p>
      <text:p text:style-name="P823">24,11 Ant a bessiri a campu medas profetas frassus e ant a trampai a medas;</text:p>
      <text:soft-page-break/>
      <text:p text:style-name="P824">24,12 e, giai ca s'ingiustìtzia s’at a spainai/s’est spainada, s'amori de medas s'at a sfridai.</text:p>
      <text:p text:style-name="P825">24,13 Ma chini at a aguantai fintzas a sa fini at a èssiri sarvau.</text:p>
      <text:p text:style-name="P826">24,14 E custu vangèliu de su rennu at a èssiri annuntziau in totu su mundu, cumenti a testimonia in totu is natzionis; e insaras at a arribbai sa fini.</text:p>
      <text:p text:style-name="P827">24,15 Candu duncas eis a biri s'arrori de s'abbandonu in logu santu, chi iat annuntziau su profeta Danieli, - chini ligit cunprendat -,</text:p>
      <text:p text:style-name="P828">24,16 tandu is chi funt in Giudea si fuant a is montis,</text:p>
      <text:p text:style-name="P829">24,17 chini est in crobetura no calit a ndi pigai is cosas suas de domu,</text:p>
      <text:p text:style-name="P830">24,18 e chini nc'est in su sartu no torrit agoa a ndi pigai su manteddu suu.</text:p>
      <text:p text:style-name="P831">24,19 Arguai a is fèminas prìngias e a is chi funt allatendi in cussas diis.
</text:p>
      <text:p text:style-name="P832">24,20 Pregai po chi sa fuida bosta no acuntessat in ierru o in dii de sàbudu.
</text:p>
      <text:p text:style-name="P833">24,21 Ca ddoi at a àiri una tribbulia manna, chi mai si nd'iat bistu aici, de s'inghitzu de su mundu fintzas a immoi, ni mai prus si nd'at a biri.</text:p>
      <text:p text:style-name="P834">24,22 E si cuddas diis no fessint incurtzadas, nemus siat a sarvai; ma po mori de is eletus cuddas diis s'ant a incurtzai.</text:p>
      <text:p text:style-name="P835">24,23 E si calincunu s'at a narai: "Ecu, su Cristu est innoi", o: "Est inguddei", no ddi cretais.</text:p>
      <text:p text:style-name="P836">24,24 Difatis, ant a essiri a campu cristus frassus e profetas frassus e ant a fàiri grandu sinnus e prodìgius aici de straviai, si fait, fintzas a is eletus.
</text:p>
      <text:p text:style-name="P837">24,25 Ecu, deu si dd'apu narau de innantis.
</text:p>
      <text:p text:style-name="P838">24,26 Si duncas bosi ant a narai: "Ecu, est in su desertu", no ddoi andeis; o: "Est in domu" no nci cretais.
</text:p>
      <text:p text:style-name="P839">24,27 Aici cumenti su lampu benit de orienti e luxit fintzas a ocidenti, aici etotu at a èssiri sa bènnida de su Fillu de s'òmini.
</text:p>
      <text:p text:style-name="P840">24,28 Innui est chi siat su speigu, innia s’ant aciocai a pari is untruxus.</text:p>
      <text:p text:style-name="P841">24,29 Luegu a pustis de sa tribbulia de cuddas diis, su soli s'at a scurigai/, sa luna no at a donai prus lugori, is steddus nd'ant a arrùiri de celu e is potèntzias de su celu ant a èssiri avolotadas.</text:p>
      <text:p text:style-name="P842">24,30 E tandu in celu at a aparèssiri su sinnu de su Fillu de s'òmini e insaras totu is tribus de sa terra s'ant a atripai su petus, e ant a biri a su Fillu de s'òmini benendi de is nuis de su celu cun grandu potèntzia e glòria.</text:p>
      <text:p text:style-name="P843">24,31 E issu at a mandai is àngiulus suus cun sonu mannu de trumba e ant a pinnigai a pari de  is cuatru bentus, totu is eletus suus, de unu trèmini a s'àteru de is celus.</text:p>
      <text:p text:style-name="P844">24,32 De sa mata de sa figu imparai sa paràbula: candu su cambu suu si fait  moddi, e bogat folla, cumprendeis ca s'istadi est acanta.</text:p>
      <text:p text:style-name="P845">24,33 Aici etotu bosàterus, candu eis a biri totu custas cosas, cumprendei ca issu est acanta, in sa genna.</text:p>
      <text:p text:style-name="P846">24,34 In beridadi bosi naru: no nc’at a passai custa generatzioni innantis chi totu custas cosas acuntessant.</text:p>
      <text:p text:style-name="P847">24,35 Nci ant a passai su celu e sa terra, ma is paràulas mias no nci ant a passai.</text:p>
      <text:p text:style-name="P848">24,36 Ma de cussa dii e de cuss'ora, nemus ndi sciit, nemancu is àngiulus de su celu e nemancu su Fillu, ma su Babbu sceti.</text:p>
      <text:p text:style-name="P849">24,37 Cumenti fiat in is diis de Noè, aici at a èssiri sa bènnida de su Fillu de s'òmini.</text:p>
      <text:p text:style-name="P850">24,38 Ca, cumenti in is diis innantis de su dilùviu papànt e bufànt, si cojànt/ pigànt mulleri e maridu, e donant is fillas in coja/cojànt is fillas fintzas a candu Noè nci fiat intrau a s'arca.</text:p>
      <text:p text:style-name="P851">24,39 e no si ndi fiant sapius de nudda fintzas a candu fiat arribbau su dilùviu e nci ddus iat ingùrtius a totus, aici at a èssiri a sa bènnida de su Fillu de s'òmini.</text:p>
      <text:p text:style-name="P852">24,40 Insaras duus òminis ant a èssiri in su sartu: a unu ndi dd'ant a pigai e a s'àteru dd'ant a lassai.</text:p>
      <text:soft-page-break/>
      <text:p text:style-name="P853">24,41 Duas fèminas ant a èssiri molendi in sa mola: a una ndi dd'ant a pigai e a s'àtera dd'ant a lassai.</text:p>
      <text:p text:style-name="P854">24,42 Billai duncas, ca no ddu scieis in cali dii at a bènniri su Sennori bostu.</text:p>
      <text:p text:style-name="P855">24,43 Cumprendei custu: si su meri de domu iat a sciri a ita ora de sa noti benit su furuncu, iat a billai e no s'iat a lassai sdorrobbai sa domu.</text:p>
      <text:p text:style-name="P856">24,44 Po cussu bosàterus puru siais prontus, ca candu no si dd'abetais su Fillu de s'òmini at a bènniri.</text:p>
      <text:p text:style-name="P857">24,45 Chini est duncas su tzeracu fidau e sàbiu chi su meri at postu a cabu de is tzeracus suus cun s'incàrrigu de ddis donai a papai a su tempus giustu?</text:p>
      <text:p text:style-name="P858">24,46 Biadu cussu tzeracu, chi candu torrat su meri, dd'at a agatai fendi aici!</text:p>
      <text:p text:style-name="P859">24,47 In beridadi bosi naru: dd'at a pònniri a guvernai totu is benis suus.</text:p>
      <text:p text:style-name="P860">24,48 Ma si custu tzeracu malu iat a narai in coru suu: Su meri miu stentat a bènniri,</text:p>
      <text:p text:style-name="P861">24,49 e iat a cumentzai a scùdiri a is cumpàngius tzeracus e a bufai e a papai cun is imbriagonis,</text:p>
      <text:p text:style-name="P862">24,50 at a arribbai su meri candu su tzeracu no si dd'abetat e in s'ora chi no sciit,</text:p>
      <text:p text:style-name="P863">24,51 dd'at a fàiri in duus tancus e dd'at a donai sa sorti chi is ipòcritas si minescint: e innia ddoi at a àiri/at a èssiri prantu e tzichirriu de dentis.</text:p>
      <text:p text:style-name="P864">25,1 Su rennu de is celus s'at a assimbillai a dexi vìrginis chi, pigadas is làntias insoru, fiant essias a atobiai a su sposu.</text:p>
      <text:p text:style-name="P865">

25,2 Cincu de custas fiant trevessas e cincu fiant sàbias;
</text:p>
      <text:p text:style-name="P866">25,3 is trevessas iant pigau is làntias insoru, ma no iant ingortu ollu avatu;</text:p>
      <text:p text:style-name="P867">25,4 is sàbias intamis, paris cun is làntias, s'iant pigau ollu aintru de ampuddixeddas.</text:p>
      <text:p text:style-name="P868">25,5 Po mori ca su sposu fiat stentendi, ddis iat pigau su sonnu e si fiant dormias totus.</text:p>
      <text:p text:style-name="P869">25,6 A mesunoti si fiat intèndia una boxi: "Ecu su sposu, essei a dd'atobiai!".</text:p>
      <text:p text:style-name="P870">25,7 Insaras totu cuddas vìrginis si ndi fiant pesadas e iant aprontau is làntias insoru.</text:p>
      <text:p text:style-name="P871">25,8 E is trevessas iant naru a is sàbias: "Donai·sì de s'ollu de bosàterus, ca is làntias nostas funt studendi·si·ndi".</text:p>
      <text:p text:style-name="P872">25,9 Ma is sàbias ddis iant arrespustu: "Nossi, no siat chi no bastit a nosu e a bosàterus; prusaprestu baxei a is bendidoris e comporai·si·ndi".</text:p>
      <text:p text:style-name="P873">25,10 Ma in s'ora chi cuddas fiant andendi a comporai s'ollu, fiat arribbau su sposu e is vìrginis chi fiant prontas fiant intradas cun issu a sa coja e iant cungiau sa genna.</text:p>
      <text:p text:style-name="P874"><text:s/>25,11 Prus a tradu fiant lòmpias fintzas is àteras vìrginis narendi: "Sennori, sennori, fai·sì intrai!".</text:p>
      <text:p text:style-name="P875">25,12 Ma issu iat arrespustu: "In beridadi bosi naru: deu no si connòsciu".</text:p>
      <text:p text:style-name="P876">25,13 Billai duncas, ca no scieis sa dii e nemancu s'ora.</text:p>
      <text:p text:style-name="P877">25,14 At acuntessi cumenti a un'òmini chi, partendi a unu logu atesu, iat tzerriau a is tzeracus suus e ddis iat fidau is benis suus.</text:p>
      <text:p text:style-name="P878">25,15 A unu dd'iat donau cincu talentus, a un'àteru duus, a un'àteru unu, a onniunu segundu sa capassidadi sua, e fiat mòviu.</text:p>
      <text:p text:style-name="P879">25,16 Su chi iat arriciu cincu talentus, fiat andau deretu a ddus pònniri a frutu e nd'iat guadangiau àterus cincu.</text:p>
      <text:p text:style-name="P880">25,17 Aici etotu su chi nd'iat arriciu duus, nd'iat guadangiau àterus duus.
</text:p>
      <text:p text:style-name="P881">25,18 Ma su chi intamis iat arriciu unu talentu sceti, fiat andau a fàiri unu fossu in terra e ddoi iat cuau su dinai de su meri.</text:p>
      <text:p text:style-name="P882">25,19 A pustis de tempus meda su meri de cuddus tzeracus fiat torrau, e iat bòfiu asseliai is contus cun issus.
</text:p>
      <text:soft-page-break/>
      <text:p text:style-name="P883">25,20 Su chi iat arriciu cincu talentus, nd'iat presentau àterus cincu, narendi: "Sennori, m'ias fidau cincu talentus; ecu, nd'apu guadangiau àterus cincu"</text:p>
      <text:p text:style-name="P884">25,21 E su meri ddi iat narau: "Beni, tzeracu bonu e fideli, ses stètiu fideli in su pagu, t'apu a donai autoridadi in su meda; piga parti a su gosu de su meri tuu".
</text:p>
      <text:p text:style-name="P885">25,22 A pustis si fiat presentau su chi iat arriciu duus talentus, narendi: "Sennori, m'ias intregau duus talentus; càstia, nd'apu guadangiau àterus duus".
</text:p>
      <text:p text:style-name="P886">25,23 "Beni, tzeracu bonu e fideli", dd'iat arrespustu su meri, ses stètiu fideli in su pagu, t'apu a donai autoridadi in su meda; piga parti a su gosu de su meri tuu".</text:p>
      <text:p text:style-name="P887">25,24 Si fiat presentau fintzas su chi ita arriciu unu talentu sceti e iat narau: "Sennori, sciu ca ses un'òmini severu/tostau, chi messas innui no as seminau e incùngias innui no as ghetau;</text:p>
      <text:p text:style-name="P888">25,25 e timendi seu andau e apu cuau su talentu a suta de terra, ecu innoi su tuu".</text:p>
      <text:p text:style-name="P889">25,26 Su meri dd'iat arrespustu: "Tzeracu malu e preitzosu, gei ddu sciiast ca messu innui no apu seminau e incùngiu innui no apu ghetau;
</text:p>
      <text:p text:style-name="P890">25,27 depias intregai su dinai miu a is bancheris e aici, torrendi, ndi ia apu a àiri arretirau su miu cun s'interessu.</text:p>
      <text:p text:style-name="P891">25,28 Pigainde·ddi duncas su talentu, e donaide·ddu a su chi tenit is dexi talentus.</text:p>
      <text:p text:style-name="P892">25,29 Poita a chini tenit ndi dd'ant a donai e at a tènniri in abbundàntzia; ma a chini no tenit ndi dd'ant leai fintzas su chi tenit.
</text:p>
      <text:p text:style-name="P893">25,30 E a su tzeracu chi no serbit a nudda ghetai·nce·ddu a foras a/in su scuriu; innia ddoi at àiri/at a èssiri prantu e tzichirriu de dentis".</text:p>
      <text:p text:style-name="P894">25,31 Candu su Fillu de s'òmini at a bènniri in sa glòria sua e totu is àngiulus cun issu, insaras s'at a sètziri in sa trona de sa glòria sua.
</text:p>
      <text:p text:style-name="P895">25,32 E ananti suu ant a èssiri arreunius totu is pòpulus, e issu at a pratziri is unus de is àterus, cumenti su pastori pratzit/nd'at a stallai is brebeis de is crabas,
</text:p>
      <text:p text:style-name="P896">25,33 At a pònniri is brebeis a dereta sua e is crabas a manu de manca.</text:p>
      <text:p text:style-name="P897">25,34 E su rei at a narai a is chi funt a sa dereta sua: Benei, beneitus de Babbu miu, arricei in eredidadi su rennu aprontau po bosàterus giai de candu est fatu su mundu.</text:p>
      <text:p text:style-name="P898">25,35 Ca deu apu tentu fàmini e m'eis donau a papai, apu tentu sidi e m'eis donau a bufai; fia furesteri e m'eis chistiu,</text:p>
      <text:p text:style-name="P899">25,36 fia spollincu e m'eis bistiu, fia malàidu e seis bènnius m'abbisitai, fia in presoni e seis bènnius a mi biri.</text:p>
      <text:p text:style-name="P900">25,37 Insaras is giustus dd'ant a arrespùndiri: "Sennori, candu est chi t'eus bistu famiu e t'eus donau a papai, sidiu e t'eus donau a bufai?</text:p>
      <text:p text:style-name="P901">25,38 Candu est chi t'eus bistu furisteri e t'eus chistiu, o spollincu e t'eus bistiu?</text:p>
      <text:p text:style-name="P902">25,39 E candu t'eus bistu malàidu o in presoni e seus andaus a ti abbisitai?".</text:p>
      <text:p text:style-name="P903">25,40 Arrespundendi, su rei ddis at a narai: In beridadi bosi naru: ònnia borta chi eis fatu custas cosas a unu sceti de custus fradis mius prus piticus, dd'eis fatu a mei.</text:p>
      <text:p text:style-name="P904">25,41 A pustis a is chi funt a manca sua ddis at a narai: Baxei·si·ndi, atesu de mei, malaitus, a su fogu eternu, aprontau po su tiàulu e po is àngiulus suus.</text:p>
      <text:p text:style-name="P905">25,42 Poita ca apu tentu fàmini e no m'eis donau a papai; apu tentu sidi e no m'eis donau a bufai;
</text:p>
      <text:p text:style-name="P906">25,43 fia furisteri e no m'eis chistiu, spollincu e no m'eis bèstiu, malàidu e in presoni e no m'eis abbisitau».</text:p>
      <text:p text:style-name="P907">25,44 Issus puru tandu ant a narai : «Sennori, candu est chi t'eus bistu famiu o sidiu o furisteri o spollincu o malàidu o in presoni e no t'eus atèndiu?».</text:p>
      <text:p text:style-name="P908">25,45 E issu at a arrespùndiri: «In beridadi bosi naru: ònnia borta chi no eis fatu custas cosas a unu de custus prus piticus, no dd'eis fatu a mei.
</text:p>
      <text:soft-page-break/>
      <text:p text:style-name="P909">25,46 E si ndi ant a andai, custus a su suplìtziu/trumentu eternu, e is giustus a sa vida eterna».</text:p>
      <text:p text:style-name="P910">26,1 Candu iat acabbau totu custus arrexonus, Gesùs ddis iat narau a is discìpulus suus:</text:p>
      <text:p text:style-name="P911">26,2 «Bosàterus scieis ca pusticràs est Pasca e ca a su Fillu de s'òmini dd'ant a intregai po ddu pònniri in cruxi».</text:p>
      <text:p text:style-name="P912"><text:s/>26,3 Insaras is sacerdotus majoris e is mannus de su pòpulu si fiant assoddius/arreunius in sa corti de su sacerdotu majori, chi ddi narànt Caifa,</text:p>
      <text:p text:style-name="P913">26,4 iant detzìdiu de aciapai a traitoria a Gesùs po ddu fàiri bociri.</text:p>
      <text:p text:style-name="P914">26,5 Ma narànt: «Chi no siat in s'interis de sa festa, po chi no ddoi siat avolotu in su pòpulu».</text:p>
      <text:p text:style-name="P915">26,6 Candu Gesùs nci fiat in Betània, in domu de Simoni su lebbrosu,</text:p>
      <text:p text:style-name="P916">26,7 si ddi fiat acostiada una fèmina cun un'ampuddixedda de alabastru prena de ollu profumau pretziosu meda, e si dd'iat ghetau a conca candu fiat in sa mesa.</text:p>
      <text:p text:style-name="P917">26,8 Is discìpulus biendi custu si fiant arrennegaus e iant narau: «E poita custu sperdìtziu?</text:p>
      <text:p text:style-name="P918">26,9 Faiat a ddu bèndiri a caru e si ddu donai a is pòburus/ e donai su dinai a is pòburus!».</text:p>
      <text:p text:style-name="P919">26,10 Ma Gesùs, acatendi·si·ndi, ddis iat narau: «Poit'est chi seis donendi àxiu a custa fèmina?  Issa m'at fatu un'òpera bona.</text:p>
      <text:p text:style-name="P920">26,11 Difatis is pòburus ddus portais sempri cun bosàterus, ma a mei, no sempri mi teneis.</text:p>
      <text:p text:style-name="P921">26,12 Poita chi m'at ghetau cust'ollu a pitzus, dd'at fatu pensendi a s'interru miu.</text:p>
      <text:p text:style-name="P922">26,13 In beridadi bosi naru: innui si siat chi ant a predicai custu vangèliu, in totu su mundu, ant a contai fintzas su chi issa at fatu, in memòria sua».</text:p>
      <text:p text:style-name="P923">26,14 Tandu unu de is doxi, su chi ddi narànt Giudas Iscariota, fiat andau a biri/aundi fiant/anca fiant is sacerdotus majoris</text:p>
      <text:p text:style-name="P924">26,15 e iat narau: «Cantu mi boleis donai po si ddu intregai?». 


 E issus ddi iant stabbiliu trinta dinais de prata.</text:p>
      <text:p text:style-name="P925">26,16 De insaras fiat circhendi s'ocasioni bona po ddu intregai.


</text:p>
      <text:p text:style-name="P926">26,17 Sa primu dii de is panis Ázimus, is discìpulus si fiant acostiaus a Gesùs e ddi iant narau: «Innui bolis chi apronteus po ti papai sa Pasca?».</text:p>
      <text:p text:style-name="P927">26,18 E issu iat arrespustu: «Baxei a citadi, a domu de su tali e naraide·ddi: Su Maistu narat: Su tempus miu est acanta, apu a fàiri sa Pasca cun is discìpulus mius in domu tua».</text:p>
      <text:p text:style-name="P928">26,19 Is discìpulus iant fatu cumenti ddis iat cumandau Gesùs, e iant aprontau sa Pasca.</text:p>
      <text:p text:style-name="P929">26,20 Lòmpiu su merì, si fiat sètziu in sa mesa impari cun is Doxi.</text:p>
      <text:p text:style-name="P930">26,21 Candu fiant papendi iat narau: «In beridadi bosi naru, unu de bosàterus m'at a traìxiri».</text:p>
      <text:p text:style-name="P931">26,22 E issus, addolorius meda, a unu a unu iant cumentzau a ddi preguntai: «Sennori, Deu seu?».</text:p>
      <text:p text:style-name="P932">26,23 E issu iat arrespustu: «Su chi at infustu impari a mei sa manu in su pratu, cussu m'at a traìxiri.</text:p>
      <text:p text:style-name="P933">26,24 Su Fillu de s'òmini si ndi andat, cumenti est scritu de issu, ma arguai a su chi traixit a su Fillu de s'òmini; mellus iat a èssiri po issu chi no fessit nàsciu!».</text:p>
      <text:p text:style-name="P934">26,25 Giudas, su chi dd'iat a traixiri, iat narau: «Rabbi, no ap'a a èssiri deu?».  E dd'iat arrespustu: «Tui dd'as narau».</text:p>
      <text:p text:style-name="P935">26,26 In s'ora chi issus fiant papendi, Gesùs iat pigau su pani e, a pustis chi dd'iat beneixu, dd'iat pratziu e dd'iat donau a is discìpulus narendi: «Pigai e papai; custu est su corpus miu».</text:p>
      <text:p text:style-name="P936">26,27 A pustis iat pigau su càlixi e, torrendi gràtzias, si ddus iat donau, narendi: «Bufaide·ndi totus,</text:p>
      <text:p text:style-name="P937">26,28 ca custu est su sànguni miu de s'alleàntzia, spartu po medas, in perdonu de is pecaus.</text:p>
      <text:p text:style-name="P938">26,29 Deu bosi naru ca de immoi no apu a bufai prus de custu frutu de sa bìngia fintzas a sa dii chi dd'apu a bufai nou cun bosàterus in su Rennu de Babbu miu».</text:p>
      <text:soft-page-break/>
      <text:p text:style-name="P939">26,30 E a pustis de àiri cantau s'innu, fiant bessius conca a su Monti de is Olias.</text:p>
      <text:p text:style-name="P940">26,31 Tandu Gesùs ddis iat narau: «Totu Bosàterus notesta s'eis a scandalizai po mori mia.  Ddoi est scritu difatis:
Apu a scùdiri a su pastori e is brebeis de su tallu s'ant a spratzinai,
</text:p>
      <text:p text:style-name="P941">26,32 ma a pustis de s'arresurretzioni mia, apu a andai a innantis de bosàterus a Galilea».</text:p>
      <text:p text:style-name="P942">26,33 E Pedru ddi iat narau: «Mancai totus s'ant a scandalizai po mori tua, deu no m'apu a scandalizai mai».</text:p>
      <text:p text:style-name="P943">26,34 Ddi iat narau Gesùs: «In beridadi ti naru: notesta etotu, innantis chi su caboni cantit, m'as a disconnòsciri tres bortas».</text:p>
      <text:p text:style-name="P944">26,35 E Pedru ddi iat arrespustu: «Mancai depa mòrriri cun tui, no t'apu a disconnòsciri mai».  Su pròpriu iant narau totu is discìpulus.</text:p>
      <text:p text:style-name="P945">26,36 Tandu Gesùs fiat andau impari a issus a unu cungiau, chi ddi narànt Getsèmani, e iat narau a is discìpulus: «Setzei·sì innoi, in s’ora chi andu a innia a pregai».
</text:p>
      <text:p text:style-name="P946">26,37 S'iat nd'iat leau infatu a Pedru e a is duus fillus de Zededeu e iat cumentzau a ddi pigai tristura e axiori.
</text:p>
      <text:p text:style-name="P947">26,38 Ddis iat narau: «S'ànima mia est trista a si mòrriri; abarrai innoi e billai cun mei».
</text:p>
      <text:p text:style-name="P948">26,39 E avantzendi prus innantis si fiat ghetau faci a terra e pregàt narendi: Babbu miu, si fait, passit/si stesiit de mei custu càlixi!  Ma no siat cumenti bollu deu, prus a prestu cumenti bolis tui!».</text:p>
      <text:p text:style-name="P949">26,40 E fiat torrau a innui fiant is discìpulus e ddus iat agataus dromius. 
 E iat narau a Pedru: «Aici no nci dd'eis fata a billai mancu un'ora cunmegus?</text:p>
      <text:p text:style-name="P950">26,41 Billai e pregai, po no nci arrui in tentatzioni.  Su spìridu est prontu, ma sa carri est dèbbili».</text:p>
      <text:p text:style-name="P951">26,42 E si fiat torrau a stesiai pregàt narendi: «Babbu miu si custu càlixi no podit passai de mei chene chi mi ddu bufi, siat fata sa voluntadi tua».
</text:p>
      <text:p text:style-name="P952">26,43 E furriendi ddus iat torraus agatai dromius, poita ca  ddus iat bintus su sonnu.</text:p>
      <text:p text:style-name="P953">26,44 E lassendide·ddus, si ndi fiat torrau a andai un'àtera borta e iat pregau po sa tres bortas, torrendi a narai is matessi paràulas.</text:p>
      <text:p text:style-name="P954">26,45 A pustis fiat andau anca fiant is discìpulus suus e ddis iat narau: «Dromei (puru) immoi e pasiai·sì! 
 Ca tantis est lòmpia s'ora e su Fillu de s'òmini ddu intregant in manus a is pecadoris.</text:p>
      <text:p text:style-name="P955">26,46 Pesai·si·ndi, andeus. Mi', su chi mi traixit est benendi».
</text:p>
      <text:p text:style-name="P956">26,47 In s'interis chi fiat fueddendi, mi'  arribendi a Giudas, unu de is Doxi, e cun issu una truma manna de genti a spadas e a matzucus, mandada de is sacerdotus majoris e de is mannus de su pòpulu.</text:p>
      <text:p text:style-name="P957">26,48 Su traitori ddis iat donau custu sinnali narendi: «Su chi apu a basai, issu est; arrestaide·ddu!».</text:p>
      <text:p text:style-name="P958">26,49 E luegus si fiat acostiau a Gesùs e iat narau: «Saludi, Rabbi!». 
 E dd'iat basau.</text:p>
      <text:p text:style-name="P959">26,50 E Gesùs dd'iat narau: «Amigu, po custu ses innoi!». 
 Tandu si fiant acostiaus e a Gesùs e dd'iant aferrau e tentu.</text:p>
      <text:p text:style-name="P960">26,51 E ecu, unu de is chi fiant cun Gesùs, nd'iat bogadu sa spada de sa bàina e nd'iat donau unu corpu a su tzeracu de su sacerdotu majori esegau nd'iat  un'origa.
</text:p>
      <text:p text:style-name="P961">26,52 Tandu Gesùs dd'iat narau: «Torra·nci sa spada a su logu suu, ca totu is chi ponint/ghetant manu a sa spada ant a mòrriri de spada.</text:p>
      <text:p text:style-name="P962">26,53 Ita ti pensas/crees ca deu no potzu pregai a Babbu miu? Issu m'iat a donai deretu prus de doxi legionis de àngiulus.</text:p>
      <text:p text:style-name="P963">26,54 Ma, e tandu cumenti s'iant a cumpriri is Scrituras, chi narant ca aici depit acuntèssiri?».</text:p>
      <text:p text:style-name="P964">26,55 In cuss'ora etotu Gesùs fiat narendi a sa genti: «Cumenti contras a unu bandidu seis bessius, a spadas e a matzucus, po m'aciapai? 
 Fia ònnia dii sètziu donendi imparu in su tèmpiu, e no m'eis arrestau.</text:p>
      <text:soft-page-break/>
      <text:p text:style-name="P965">26,56 Totu custu est acuntèssiu po si cumpriri is Scrituras de is Profetas».  Tandu totu is discipulus dd'iant sbandonau e si fiant fuius.</text:p>
      <text:p text:style-name="P966">26,57 Is chi iant entu a Gesùs, nci dd'iant portau a Caifa, su sacerdoti majori, me innui si fiant assoddius is scribas e is mannus.</text:p>
      <text:p text:style-name="P967">26,58 Pedru dd'iat postu in fatu de atesu fintzas a sa corti de su sacerdotu majori. Fiat intrau issu puru e si fiat sètziu cun is serbidoris, po ndi biri s'acabbu.</text:p>
      <text:p text:style-name="P968">26,59 Is sacerdotus majoris e totu su sinèdriu fiant circhendi una testimonia frassa contras a Gesùs, po ddu cundennai a morti;</text:p>
      <text:p text:style-name="P969">26,60 ma  no nd'iant agatau mancuna, mancai si fessant presentaus meda testimòngius frassus.</text:p>
      <text:p text:style-name="P970">26,61 A ùrtimu si ndi fiant presentaus duus, afirmendi: «Custu at narau: "Ndi potzu sderrocai su tèmpiu de Deus e ndi ddu torrai a pesai in tres diis"».</text:p>
      <text:p text:style-name="P971">26,62 E si ndi fiat pesau su sacerdotu majori e ddi iat narau: «Nudda naras?  Ita testimòngiant custus contras a tui?».</text:p>
      <text:p text:style-name="P972">26,63 Ma Gesùs abarràt a sa muda.  E su sacerdotu majori ddi iat narau: «Ti pregantu po su Deus biu, nara·sì si tui ses su Cristu, su Fillu de Deus».</text:p>
      <text:p text:style-name="P973">26,64 «Tui dd'as narau, ddi iat arrespustu Gesùs, ma deu bosi naru, de immoi innantis eis a biri a su Fillu de s'òmini sètziu a manu dereta de Deus, e benendi asuba de is nuis de su celu».
</text:p>
      <text:p text:style-name="P974">26,65 E su sacerdotu majori s'iat scorriau is bestiris narendi: «At frastimau!  Ancora abbisòngiu de testimòngius teneus?  Ecu, immoi dd'eis intèndiu su frastimu;</text:p>
      <text:p text:style-name="P975">26,66 E ita bosi ndi parit?».  E issus iant arrespustu: «Ddi minescit sa morti!».</text:p>
      <text:p text:style-name="P976">26,67 E tandu ddi iant spudau in faci e donau e pigau a pinnigosus; àterus dd'iant pigau a bussinadas,</text:p>
      <text:p text:style-name="P977">26,68 narendi: «Profetitza, Cristu!  E chini est su chi t'at scutu?».</text:p>
      <text:p text:style-name="P978">26,69 Pedru in s'ora fiat sètziu in foras, in sa corti.  Una tzerachedda si ddi fiat acostiada e iat narau: «Tui puru fias cun Gesùs, su Galileu!».</text:p>
      <text:p text:style-name="P979">26,70 Ma issu si ndi fiat negau ananti a totus: «No sciu ita ses narendi».
</text:p>
      <text:p text:style-name="P980">26,71 E candu fiat andendi conca a su portali, dd'iat bistu un'àtera tzerachedda e ddis iat narau a is chi ddoi fiant: «Custu fiat cun Gesùs, su Nazarenu».</text:p>
      <text:p text:style-name="P981">26,72 Ma issu si ndi fiat torrau a negai giurendi: «No ddu connòsciu a cudd'òmini».</text:p>
      <text:p text:style-name="P982">26,73 Unu pagu a pustis, is chi ddoi fiant si ddi fiant acostiaus e a Pedru dd'iant narau: «Seguru ca tui puru ses de cuddus;  sa fueddada tua etotu ddu narat!».</text:p>
      <text:p text:style-name="P983">26,74 Insaras issu iat cumentzau a apeomai e a giurai: «Ca a cudd'òmini no  connòsciu!». 
 E in deretura unu caboni iat cantau.</text:p>
      <text:p text:style-name="P984">26,75 E Pedru s'iat arregordau de is fueddus chi iat narau Gesùs: «Innantis chi su caboni cantit, m'as a disconnòsciri tres bortas».  E essiu a foras, si fiat postu a pràngìri cun amargori.</text:p>
      <text:p text:style-name="P985">27,1<text:s/>Venuto il mattino, tutti i sommi sacerdoti e gli anziani del popolo tennero consiglio contro Gesù, per farlo morire.</text:p>
      <text:p text:style-name="P986">27,2<text:s/>Poi, messolo in catene, lo condussero e consegnarono al governatore Pilato.</text:p>
      <text:p text:style-name="P987">27,3<text:s/>Allora Giuda, il traditore, vedendo che Gesù era stato condannato, si pentì e riportò le trenta monete d'argento ai sommi sacerdoti e agli anziani</text:p>
      <text:p text:style-name="P988">27,4<text:s/>dicendo: "Ho peccato, perché ho tradito sangue innocente". Ma quelli dissero: "Che ci riguarda? Veditela tu!".</text:p>
      <text:p text:style-name="P989">27,5<text:s/>Ed egli, gettate le monete d'argento nel tempio, si allontanò e andò ad impiccarsi.</text:p>
      <text:p text:style-name="P990">27,6<text:s/>Ma i sommi sacerdoti, raccolto quel denaro, dissero: "Non è lecito metterlo nel tesoro, perché è prezzo di sangue".</text:p>
      <text:p text:style-name="P991">27,7<text:s/>E tenuto consiglio, comprarono con esso il Campo del vasaio per la sepoltura degli stranieri.</text:p>
      <text:soft-page-break/>
      <text:p text:style-name="P992">27,8<text:s/>Perciò quel campo fu denominato "Campo di sangue" fino al giorno d'oggi.</text:p>
      <text:p text:style-name="P993">27,9<text:s/>Allora si adempì quanto era stato detto dal profeta Geremia: E presero trenta denari d'argento, il prezzo del venduto, che i figli di Israele avevano mercanteggiato,</text:p>
      <text:p text:style-name="P994">27,10<text:s/>e li diedero per il campo del vasaio, come mi aveva ordinato il Signore.</text:p>
      <text:p text:style-name="P995">27,11<text:s/>Gesù intanto comparve davanti al governatore, e il governatore l'interrogò dicendo: "Sei tu il re dei Giudei?". Gesù rispose "Tu lo dici".</text:p>
      <text:p text:style-name="P996">27,12<text:s/>E mentre lo accusavano i sommi sacerdoti e gli anziani, non rispondeva nulla.</text:p>
      <text:p text:style-name="P997">27,13<text:s/>Allora Pilato gli disse: "Non senti quante cose attestano contro di te?".</text:p>
      <text:p text:style-name="P998">27,14<text:s/>Ma Gesù non gli rispose neanche una parola, con grande meraviglia del governatore.</text:p>
      <text:p text:style-name="P999">27,15<text:s/>Il governatore era solito, per ciascuna festa di Pasqua, rilasciare al popolo un prigioniero, a loro scelta.</text:p>
      <text:p text:style-name="P1000">27,16<text:s/>Avevano in quel tempo un prigioniero famoso, detto Barabba.</text:p>
      <text:p text:style-name="P1001">27,17<text:s/>Mentre quindi si trovavano riuniti, Pilato disse loro: "Chi volete che vi rilasci: Barabba o Gesù chiamato il Cristo?".</text:p>
      <text:p text:style-name="P1002">27,18<text:s/>Sapeva bene infatti che glielo avevano consegnato per invidia.</text:p>
      <text:p text:style-name="P1003">27,19<text:s/>Mentre egli sedeva in tribunale, sua moglie gli mandò a dire: "Non avere a che fare con quel giusto; perché oggi fui molto turbata in sogno, per causa sua".</text:p>
      <text:p text:style-name="P1004">27,20<text:s/>Ma i sommi sacerdoti e gli anziani persuasero la folla a richiedere Barabba e a far morire Gesù.</text:p>
      <text:p text:style-name="P1005">27,21<text:s/>Allora il governatore domandò: "Chi dei due volete che vi rilasci?". Quelli risposero:<text:s/>"Barabba!".</text:p>
      <text:p text:style-name="P1006">27,22<text:s/>Disse loro Pilato: "Che farò dunque di Gesù chiamato il Cristo?". Tutti gli risposero: "Sia crocifisso!".</text:p>
      <text:p text:style-name="P1007"><text:s/>27,23<text:s/>Ed egli aggiunse: "Ma che male ha fatto?". Essi allora urlarono: "Sia crocifisso!".</text:p>
      <text:p text:style-name="P1008"/>
      <text:p text:style-name="P1009">27,24<text:s/>Pilato, visto che non otteneva nulla, anzi che il tumulto cresceva sempre più, presa dell'acqua, si lavò le mani davanti alla folla: "Non sono responsabile, disse, di questo sangue; vedetevela voi!".</text:p>
      <text:p text:style-name="P1010">27,25<text:s/>E tutto il popolo rispose: "Il suo sangue ricada sopra di noi e sopra i nostri figli".</text:p>
      <text:p text:style-name="P1011">27,26<text:s/>Allora rilasciò loro Barabba e, dopo aver fatto flagellare Gesù, lo consegnò ai soldati perché fosse crocifisso.</text:p>
      <text:p text:style-name="P1012">27,27<text:s/>Allora i soldati del governatore condussero Gesù nel pretorio e gli radunarono attorno tutta la coorte.</text:p>
      <text:p text:style-name="P1013">27,28<text:s/>Spogliatolo, gli misero addosso un manto scarlatto</text:p>
      <text:p text:style-name="P1014">27,29<text:s/>e, intrecciata una corona di spine, gliela posero sul capo, con una canna nella destra; poi mentre gli si inginocchiavano davanti, lo schernivano: "Salve, re dei Giudei!".</text:p>
      <text:p text:style-name="P1015">27,30<text:s/>E sputandogli addosso, gli tolsero di mano la canna e lo percuotevano sul capo.</text:p>
      <text:p text:style-name="P1016">27,31<text:s/>Dopo averlo così schernito, lo spogliarono del mantello, gli fecero indossare i suoi vestiti e loportarono via per crocifiggerlo.</text:p>
      <text:p text:style-name="P1017">27,32<text:s/>Mentre uscivano, incontrarono un uomo di Cirene, chiamato Simone, e lo costrinsero a prender su la croce di lui.</text:p>
      <text:p text:style-name="P1018">27,33<text:s/>Giunti a un luogo detto Gòlgota, che significa luogo del cranio,</text:p>
      <text:p text:style-name="P1019">27,34<text:s/>gli diedero da bere vino mescolato con fiele; ma egli, assaggiatolo, non ne volle bere.</text:p>
      <text:p text:style-name="P1020">27,35<text:s/>Dopo averlo quindi crocifisso, si spartirono le sue vesti tirandole a sorte.</text:p>
      <text:soft-page-break/>
      <text:p text:style-name="P1021">27,36<text:s/>E sedutisi, gli facevano la guardia.</text:p>
      <text:p text:style-name="P1022">27,37<text:s/>Al di sopra del suo capo, posero la motivazione scritta della sua condanna: "Questi è Gesù, il re dei Giudei".</text:p>
      <text:p text:style-name="P1023">27,38<text:s/>Insieme con lui furono crocifissi due ladroni, uno a destra e uno a sinistra.</text:p>
      <text:p text:style-name="P1024">27,39<text:s/>E quelli che passavano di là lo insultavano scuotendo il capo e dicendo:</text:p>
      <text:p text:style-name="P1025">27,40<text:s/>"Tu che distruggi il tempio e lo ricostruisci in tre giorni, salva te stesso! Se tu sei Figlio di Dio, scendi dalla croce!".</text:p>
      <text:p text:style-name="P1026">27,41<text:s/>Anche i sommi sacerdoti con gli scribi e gli anziani lo schernivano:</text:p>
      <text:p text:style-name="P1027">27,42<text:s/>"Ha salvato gli altri, non può salvare se stesso. È il re d'Israele, scenda ora dalla croce e gli crederemo.</text:p>
      <text:p text:style-name="P1028">27,43<text:s/>Ha confidato in Dio; lo liberi lui ora, se gli vuol bene. Ha detto infatti: Sono Figlio di Dio!".</text:p>
      <text:p text:style-name="P1029">27,44<text:s/>Anche i ladroni crocifissi con lui lo oltraggiavano allo stesso modo.</text:p>
      <text:p text:style-name="P1030">27,45<text:s/>Da mezzogiorno fino alle tre del pomeriggio si fece buio su tutta la terra.</text:p>
      <text:p text:style-name="P1031">27,46<text:s/>Verso le tre, Gesù gridò a gran voce: "Elì, Elì, lemà sabactàni?", che significa: "Dio mio, Dio mio, perché mi hai abbandonato?".</text:p>
      <text:p text:style-name="P1032">27,47<text:s/>Udendo questo, alcuni dei presenti dicevano: "Costui chiama Elia".</text:p>
      <text:p text:style-name="P1033">27,48<text:s/>E subito uno di loro corse a prendere una spugna e, imbevutala di aceto, la fissò su una canna e così gli dava da bere.</text:p>
      <text:p text:style-name="P1034">27,49<text:s/>Gli altri dicevano: "Lascia, vediamo se viene Elia a salvarlo!".</text:p>
      <text:p text:style-name="P1035">27,50<text:s/>E Gesù, emesso un alto grido, spirò.</text:p>
      <text:p text:style-name="P1036">27,51<text:s/>Ed ecco il velo del tempio si squarciò in due da cima a fondo, la terra si scosse, le rocce si spezzarono,</text:p>
      <text:p text:style-name="P1037">27,52<text:s/>i sepolcri si aprirono e molti corpi di santi morti risuscitarono.</text:p>
      <text:p text:style-name="P1038">27,53<text:s/>E uscendo dai sepolcri, dopo la sua risurrezione, entrarono nella città santa e apparvero a molti.</text:p>
      <text:p text:style-name="P1039">27,54<text:s/>Il centurione e quelli che con lui facevano la guardia a Gesù, sentito il terremoto e visto quel che succedeva, furono presi da grande timore e dicevano: "Davvero costui era Figlio di Dio!".</text:p>
      <text:p text:style-name="P1040">27,55<text:s/>C'erano anche là molte donne che stavano a osservare da lontano; esse avevano seguito Gesù dalla Galilea per servirlo.</text:p>
      <text:p text:style-name="P1041">27,56<text:s/>Tra costoro Maria di Màgdala, Maria madre di Giacomo e di Giuseppe, e la madre dei figli di Zebedèo.</text:p>
      <text:p text:style-name="P1042">27,57<text:s/>Venuta la sera giunse un uomo ricco di Arimatèa, chiamato Giuseppe, il quale era diventato anche lui discepolo di Gesù.</text:p>
      <text:p text:style-name="P1043">27,58<text:s/>Egli andò da Pilato e gli chiese il corpo di Gesù. Allora Pilato ordinò che gli fosse consegnato.</text:p>
      <text:p text:style-name="P1044">27,59<text:s/>Giuseppe, preso il corpo di Gesù, lo avvolse in un candido lenzuolo</text:p>
      <text:p text:style-name="P1045">27,60<text:s/>e lo depose nella sua tomba nuova, che si era fatta scavare nella roccia; rotolata poi una gran pietra sulla porta del sepolcro, se ne andò.</text:p>
      <text:p text:style-name="P1046">27,61<text:s/>Erano lì, davanti al sepolcro, Maria di Màgdala e l'altra Maria.</text:p>
      <text:p text:style-name="P1047">27,62<text:s/>Il giorno seguente, quello dopo la Parasceve, si riunirono presso Pilato i sommi sacerdoti e i farisei, dicendo:</text:p>
      <text:p text:style-name="P1048">27,63<text:s/>"Signore, ci siamo ricordati che quell'impostore disse mentre era vivo: Dopo tre giorni<text:s/>risorgerò.</text:p>
      <text:soft-page-break/>
      <text:p text:style-name="P1049">27,64<text:s/>Ordina dunque che sia vigilato il sepolcro fino al terzo giorno, perché non vengano i suoi<text:s/>discepoli, lo rubino e poi dicano al popolo: È risuscitato dai morti. Così quest'ultima impostura sarebbe peggiore della prima!".</text:p>
      <text:p text:style-name="P1050">27,65<text:s/>Pilato disse loro: "Avete la vostra guardia, andate e assicuratevi come credete".</text:p>
      <text:p text:style-name="P1051">27,66<text:s/>Ed essi andarono e assicurarono il sepolcro, sigillando la pietra e mettendovi la guardia.</text:p>
      <text:p text:style-name="P1052">28,1<text:s/>Passato il sabato, all'alba del primo giorno della settimana, Maria di Màgdala e l'altra Maria andarono a visitare il sepolcro.</text:p>
      <text:p text:style-name="P1053">28,2<text:s/>Ed ecco che vi fu un gran terremoto: un angelo del Signore, sceso dal cielo, si accostò, rotolò la pietra e si pose a sedere su di essa.</text:p>
      <text:p text:style-name="P1054">28,3<text:s/>Il suo aspetto era come la folgore e il suo vestito bianco come la neve.</text:p>
      <text:p text:style-name="P1055">28,4<text:s/>Per lo spavento che ebbero di lui le guardie tremarono tramortite.</text:p>
      <text:p text:style-name="P1056">28,5<text:s/>Ma l'angelo disse alle donne: "Non abbiate paura, voi! So che cercate Gesù il crocifisso.</text:p>
      <text:p text:style-name="P1057">28,6<text:s/>Non è qui. È risorto, come aveva detto; venite a vedere il luogo dove era deposto.</text:p>
      <text:p text:style-name="P1058">28,7<text:s/>Presto, andate a dire ai suoi discepoli: È risuscitato dai morti, e ora vi precede in Galilea; là lo vedrete. Ecco, io ve l'ho detto".</text:p>
      <text:p text:style-name="P1059">28,8<text:s/>Abbandonato in fretta il sepolcro, con timore e gioia grande, le donne corsero a dare l'annunzio ai suoi discepoli.</text:p>
      <text:p text:style-name="P1060">28,9<text:s/>Ed ecco Gesù venne loro incontro dicendo: "Salute a voi". Ed esse, avvicinatesi, gli cinsero i piedi e lo adorarono.</text:p>
      <text:p text:style-name="P1061">28,10<text:s/>Allora Gesù disse loro: "Non temete; andate ad annunziare ai miei fratelli che vadano in Galilea e là mi vedranno".</text:p>
      <text:p text:style-name="P1062">28,11<text:s/>Mentre esse erano per via, alcuni della guardia giunsero in città e annunziarono ai sommi<text:s/>sacerdoti quanto era accaduto.</text:p>
      <text:p text:style-name="P1063">28,12<text:s/>Questi si riunirono allora con gli anziani e deliberarono di dare una buona somma di denaro ai soldati dicendo:</text:p>
      <text:p text:style-name="P1064">28,13<text:s/>"Dichiarate: i suoi discepoli sono venuti di notte e l'hanno rubato, mentre noi dormivamo.</text:p>
      <text:p text:style-name="P1065">28,14<text:s/>E se mai la cosa verrà all'orecchio del governatore noi lo persuaderemo e vi libereremo da ogni noia".</text:p>
      <text:p text:style-name="P1066">28,15<text:s/>Quelli, preso il denaro, fecero secondo le istruzioni ricevute. Così questa diceria si è<text:s/>divulgata fra i Giudei fino ad oggi.</text:p>
      <text:p text:style-name="P1067">28,16<text:s/>Gli undici discepoli, intanto, andarono in Galilea, sul monte che Gesù aveva loro fissato.</text:p>
      <text:p text:style-name="P1068">28,17<text:s/>Quando lo videro, gli si prostrarono innanzi; alcuni però dubitavano.</text:p>
      <text:p text:style-name="P1069">28,18<text:s/>E Gesù, avvicinatosi, disse loro: "Mi è stato dato ogni potere in cielo e in terra.</text:p>
      <text:p text:style-name="P1070">28,19<text:s/>Andate dunque e ammaestrate tutte le nazioni, battezzandole nel nome del Padre e del Figlio e dello Spirito santo,</text:p>
      <text:p text:style-name="P1071">28,20<text:s/>insegnando loro ad osservare tutto ciò che vi ho comandato.  </text:p>
      <text:p text:style-name="P1072"><text:span text:style-name="T1073"><text:s text:c="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New,Bold" svg:font-family="CourierNew,Bold"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style:language-asian="it" style:country-asian="IT"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olo2" style:display-name="Titolo 2" style:family="paragraph" style:parent-style-name="Normale" style:next-style-name="Normale"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olo3" style:display-name="Titolo 3" style:family="paragraph" style:parent-style-name="Normale" style:next-style-name="Normale"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olo4" style:display-name="Titolo 4" style:family="paragraph" style:parent-style-name="Normale" style:next-style-name="Normale"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olo5" style:display-name="Titolo 5" style:family="paragraph" style:parent-style-name="Normale" style:next-style-name="Normale" style:default-outline-level="5">
      <style:paragraph-properties fo:keep-with-next="always" fo:keep-together="always" fo:margin-top="0.0555in" fo:margin-bottom="0.0277in"/>
      <style:text-properties style:font-name-asian="Times New Roman" fo:color="#0F4761" fo:hyphenate="false"/>
    </style:style>
    <style:style style:name="Titolo6" style:display-name="Titolo 6" style:family="paragraph" style:parent-style-name="Normale" style:next-style-name="Normale"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olo7" style:display-name="Titolo 7" style:family="paragraph" style:parent-style-name="Normale" style:next-style-name="Normale" style:default-outline-level="7">
      <style:paragraph-properties fo:keep-with-next="always" fo:keep-together="always" fo:margin-top="0.0277in" fo:margin-bottom="0in"/>
      <style:text-properties style:font-name-asian="Times New Roman" fo:color="#595959" fo:hyphenate="false"/>
    </style:style>
    <style:style style:name="Titolo8" style:display-name="Titolo 8" style:family="paragraph" style:parent-style-name="Normale" style:next-style-name="Normale"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olo9" style:display-name="Titolo 9" style:family="paragraph" style:parent-style-name="Normale" style:next-style-name="Normale" style:default-outline-level="9">
      <style:paragraph-properties fo:keep-with-next="always" fo:keep-together="always" fo:margin-bottom="0in"/>
      <style:text-properties style:font-name-asian="Times New Roman" fo:color="#272727" fo:hyphenate="false"/>
    </style:style>
    <style:style style:name="Normale" style:display-name="Normale" style:family="paragraph">
      <style:text-properties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Aptos Display" style:font-name-asian="Times New Roman" style:font-name-complex="Times New Roman" fo:color="#0F4761" fo:font-size="20pt" style:font-size-asian="20pt" style:font-size-complex="20pt"/>
    </style:style>
    <style:style style:name="Titolo2Carattere" style:display-name="Titolo 2 Carattere" style:family="text" style:parent-style-name="Car.predefinitoparagrafo">
      <style:text-properties style:font-name="Aptos Display" style:font-name-asian="Times New Roman" style:font-name-complex="Times New Roman" fo:color="#0F4761" fo:font-size="16pt" style:font-size-asian="16pt" style:font-size-complex="16pt"/>
    </style:style>
    <style:style style:name="Titolo3Carattere" style:display-name="Titolo 3 Carattere" style:family="text" style:parent-style-name="Car.predefinitoparagrafo">
      <style:text-properties style:font-name-asian="Times New Roman" style:font-name-complex="Times New Roman" fo:color="#0F4761" fo:font-size="14pt" style:font-size-asian="14pt" style:font-size-complex="14pt"/>
    </style:style>
    <style:style style:name="Titolo4Carattere" style:display-name="Titolo 4 Carattere" style:family="text" style:parent-style-name="Car.predefinitoparagrafo">
      <style:text-properties style:font-name-asian="Times New Roman" style:font-name-complex="Times New Roman" fo:font-style="italic" style:font-style-asian="italic" style:font-style-complex="italic" fo:color="#0F4761"/>
    </style:style>
    <style:style style:name="Titolo5Carattere" style:display-name="Titolo 5 Carattere" style:family="text" style:parent-style-name="Car.predefinitoparagrafo">
      <style:text-properties style:font-name-asian="Times New Roman" style:font-name-complex="Times New Roman" fo:color="#0F4761"/>
    </style:style>
    <style:style style:name="Titolo6Carattere" style:display-name="Titolo 6 Carattere" style:family="text" style:parent-style-name="Car.predefinitoparagrafo">
      <style:text-properties style:font-name-asian="Times New Roman" style:font-name-complex="Times New Roman" fo:font-style="italic" style:font-style-asian="italic" style:font-style-complex="italic" fo:color="#595959"/>
    </style:style>
    <style:style style:name="Titolo7Carattere" style:display-name="Titolo 7 Carattere" style:family="text" style:parent-style-name="Car.predefinitoparagrafo">
      <style:text-properties style:font-name-asian="Times New Roman" style:font-name-complex="Times New Roman" fo:color="#595959"/>
    </style:style>
    <style:style style:name="Titolo8Carattere" style:display-name="Titolo 8 Carattere" style:family="text" style:parent-style-name="Car.predefinitoparagrafo">
      <style:text-properties style:font-name-asian="Times New Roman" style:font-name-complex="Times New Roman" fo:font-style="italic" style:font-style-asian="italic" style:font-style-complex="italic" fo:color="#272727"/>
    </style:style>
    <style:style style:name="Titolo9Carattere" style:display-name="Titolo 9 Carattere" style:family="text" style:parent-style-name="Car.predefinitoparagrafo">
      <style:text-properties style:font-name-asian="Times New Roman" style:font-name-complex="Times New Roman" fo:color="#272727"/>
    </style:style>
    <style:style style:name="Titolo" style:display-name="Titolo" style:family="paragraph" style:parent-style-name="Normale" style:next-style-name="Normale">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oloCarattere" style:display-name="Titolo Carattere" style:family="text" style:parent-style-name="Car.predefinitoparagrafo">
      <style:text-properties style:font-name="Aptos Display" style:font-name-asian="Times New Roman" style:font-name-complex="Times New Roman" fo:letter-spacing="-0.0069in" style:letter-kerning="true" fo:font-size="28pt" style:font-size-asian="28pt" style:font-size-complex="28pt"/>
    </style:style>
    <style:style style:name="Sottotitolo" style:display-name="Sottotitolo" style:family="paragraph" style:parent-style-name="Normale" style:next-style-name="Normale">
      <style:text-properties style:font-name-asian="Times New Roman" fo:color="#595959" fo:letter-spacing="0.0104in" fo:font-size="14pt" style:font-size-asian="14pt" style:font-size-complex="14pt" fo:hyphenate="false"/>
    </style:style>
    <style:style style:name="SottotitoloCarattere" style:display-name="Sottotitolo Carattere" style:family="text" style:parent-style-name="Car.predefinitoparagrafo">
      <style:text-properties style:font-name-asian="Times New Roman" style:font-name-complex="Times New Roman" fo:color="#595959" fo:letter-spacing="0.0104in" fo:font-size="14pt" style:font-size-asian="14pt" style:font-size-complex="14pt"/>
    </style:style>
    <style:style style:name="Citazione" style:display-name="Citazione" style:family="paragraph" style:parent-style-name="Normale" style:next-style-name="Normale">
      <style:paragraph-properties fo:text-align="center" fo:margin-top="0.1111in"/>
      <style:text-properties fo:font-style="italic" style:font-style-asian="italic" style:font-style-complex="italic" fo:color="#404040" fo:hyphenate="false"/>
    </style:style>
    <style:style style:name="CitazioneCarattere" style:display-name="Citazione Carattere" style:family="text" style:parent-style-name="Car.predefinitoparagrafo">
      <style:text-properties fo:font-style="italic" style:font-style-asian="italic" style:font-style-complex="italic" fo:color="#404040"/>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Enfasiintensa" style:display-name="Enfasi intensa" style:family="text" style:parent-style-name="Car.predefinitoparagrafo">
      <style:text-properties fo:font-style="italic" style:font-style-asian="italic" style:font-style-complex="italic" fo:color="#0F4761"/>
    </style:style>
    <style:style style:name="Citazioneintensa" style:display-name="Citazione intensa" style:family="paragraph" style:parent-style-name="Normale" style:next-style-name="Normale">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zioneintensaCarattere" style:display-name="Citazione intensa Carattere" style:family="text" style:parent-style-name="Car.predefinitoparagrafo">
      <style:text-properties fo:font-style="italic" style:font-style-asian="italic" style:font-style-complex="italic" fo:color="#0F4761"/>
    </style:style>
    <style:style style:name="Riferimentointenso" style:display-name="Riferimento intenso" style:family="text" style:parent-style-name="Car.predefinitoparagrafo">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Gianfranco Fronteddu</meta:initial-creator>
    <dc:creator>Gianfranco Fronteddu</dc:creator>
    <meta:creation-date>2025-12-13T00:40:00Z</meta:creation-date>
    <dc:date>2025-12-13T18:03:00Z</dc:date>
    <meta:template xlink:href="Normal.dotm" xlink:type="simple"/>
    <meta:editing-cycles>3</meta:editing-cycles>
    <meta:editing-duration>PT420S</meta:editing-duration>
    <meta:document-statistic meta:page-count="40" meta:paragraph-count="241" meta:word-count="18033" meta:character-count="120583" meta:row-count="856" meta:non-whitespace-character-count="102791"/>
  </office:meta>
</office:document-meta>
</file>